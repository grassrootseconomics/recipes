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Ingredients">
        <table:table-row>
          <table:table-cell office:value-type="string">
            <text:p>catalog_order</text:p>
          </table:table-cell>
          <table:table-cell office:value-type="string">
            <text:p>ingredient_id</text:p>
          </table:table-cell>
          <table:table-cell office:value-type="string">
            <text:p>ingredient_name</text:p>
          </table:table-cell>
          <table:table-cell office:value-type="string">
            <text:p>description</text:p>
          </table:table-cell>
          <table:table-cell office:value-type="string">
            <text:p>image_path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Melts, toppings, fillings, casseroles</text:p>
          </table:table-cell>
          <table:table-cell office:value-type="string">
            <text:p>art/ingredients/cheese_64.pn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Bread, tortillas, pancakes, dumplings, thickening</text:p>
          </table:table-cell>
          <table:table-cell office:value-type="string">
            <text:p>art/ingredients/flour_open_sack_64.pn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Basil, parsley, cilantro, oregano, thyme</text:p>
          </table:table-cell>
          <table:table-cell office:value-type="string">
            <text:p>art/ingredients/herbs_64.png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Onions, peppers, carrots, tomatoes, spinach, etc.</text:p>
          </table:table-cell>
          <table:table-cell office:value-type="string">
            <text:p>art/ingredients/vegetables_64.pn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Bowls, fried rice, casseroles, sides</text:p>
          </table:table-cell>
          <table:table-cell office:value-type="string">
            <text:p>art/ingredients/rice_64.pn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Chili, tacos, stews, bowls, dips</text:p>
          </table:table-cell>
          <table:table-cell office:value-type="string">
            <text:p>art/ingredients/beans_64.pn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Salt, pepper, cumin, paprika, chili powder, curry powder</text:p>
          </table:table-cell>
          <table:table-cell office:value-type="string">
            <text:p>art/ingredients/spices_64.png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Breakfasts, fried rice, baking, binders, toppings</text:p>
          </table:table-cell>
          <table:table-cell office:value-type="string">
            <text:p>art/ingredients/eggs_64.png</text:p>
          </table:table-cell>
        </table:table-row>
      </table:table>
      <table:table table:name="Player Count Ingredient Sets">
        <table:table-row>
          <table:table-cell office:value-type="string">
            <text:p>configuration_id</text:p>
          </table:table-cell>
          <table:table-cell office:value-type="string">
            <text:p>player_count</text:p>
          </table:table-cell>
          <table:table-cell office:value-type="string">
            <text:p>ingredient_count</text:p>
          </table:table-cell>
          <table:table-cell office:value-type="string">
            <text:p>ingredient_ids</text:p>
          </table:table-cell>
          <table:table-cell office:value-type="string">
            <text:p>ingredient_names</text:p>
          </table:table-cell>
          <table:table-cell office:value-type="string">
            <text:p>recipes_per_ingredient</text:p>
          </table:table-cell>
          <table:table-cell office:value-type="string">
            <text:p>total_recipes</text:p>
          </table:table-cell>
          <table:table-cell office:value-type="string">
            <text:p>required_items_per_recipe</text:p>
          </table:table-cell>
          <table:table-cell office:value-type="string">
            <text:p>real_units_per_ingredient</text:p>
          </table:table-cell>
          <table:table-cell office:value-type="string">
            <text:p>max_catalog_demand_per_ingredient</text:p>
          </table:table-cell>
          <table:table-cell office:value-type="string">
            <text:p>allowed_distinct_ingredient_counts</text:p>
          </table:table-cell>
        </table:table-row>
        <table:table-row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cheese, flour, herbs, vegetables, rice, beans, spices, eggs</text:p>
          </table:table-cell>
          <table:table-cell office:value-type="string">
            <text:p>Cheese, Flour, Herbs, Vegetables, Rice, Beans, Spices, Eggs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4, 5, 6</text:p>
          </table:table-cell>
        </table:table-row>
      </table:table>
      <table:table table:name="Player Count Recipes">
        <table:table-row>
          <table:table-cell office:value-type="string">
            <text:p>recipe_id</text:p>
          </table:table-cell>
          <table:table-cell office:value-type="string">
            <text:p>configuration_id</text:p>
          </table:table-cell>
          <table:table-cell office:value-type="string">
            <text:p>player_count</text:p>
          </table:table-cell>
          <table:table-cell office:value-type="string">
            <text:p>slot</text:p>
          </table:table-cell>
          <table:table-cell office:value-type="string">
            <text:p>owner_ingredient_id</text:p>
          </table:table-cell>
          <table:table-cell office:value-type="string">
            <text:p>owner_ingredient_name</text:p>
          </table:table-cell>
          <table:table-cell office:value-type="string">
            <text:p>dish_name</text:p>
          </table:table-cell>
          <table:table-cell office:value-type="string">
            <text:p>dish_family</text:p>
          </table:table-cell>
          <table:table-cell office:value-type="string">
            <text:p>part_unit_singular</text:p>
          </table:table-cell>
          <table:table-cell office:value-type="string">
            <text:p>part_unit_plural</text:p>
          </table:table-cell>
          <table:table-cell office:value-type="string">
            <text:p>total_required_qty</text:p>
          </table:table-cell>
          <table:table-cell office:value-type="string">
            <text:p>distinct_ingredient_count</text:p>
          </table:table-cell>
          <table:table-cell office:value-type="string">
            <text:p>quantity_shape</text:p>
          </table:table-cell>
          <table:table-cell office:value-type="string">
            <text:p>ingredient_ids</text:p>
          </table:table-cell>
          <table:table-cell office:value-type="string">
            <text:p>requirements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Cheese Frittata</text:p>
          </table:table-cell>
          <table:table-cell office:value-type="string">
            <text:p>egg bak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cheese, eggs, vegetables, herbs, spices, flour</text:p>
          </table:table-cell>
          <table:table-cell office:value-type="string">
            <text:p>Cheese x1, Eggs x1, Vegetables x1, Herbs x1, Spices x1, Flour x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Cheese Quesadilla</text:p>
          </table:table-cell>
          <table:table-cell office:value-type="string">
            <text:p>flatbread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cheese, flour, vegetables, beans, spices</text:p>
          </table:table-cell>
          <table:table-cell office:value-type="string">
            <text:p>Cheese x2, Flour x1, Vegetables x1, Beans x1, Spices x1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Cheesy Rice Bake</text:p>
          </table:table-cell>
          <table:table-cell office:value-type="string">
            <text:p>casserol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cheese, rice, vegetables, herbs</text:p>
          </table:table-cell>
          <table:table-cell office:value-type="string">
            <text:p>Cheese x2, Rice x2, Vegetables x1, Herbs x1</text:p>
          </table:table-cell>
        </table:table-row>
        <table:table-row>
          <table:table-cell office:value-type="string">
            <text:p>players_8_cheese_followup_3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Bean Enchilada Bake</text:p>
          </table:table-cell>
          <table:table-cell office:value-type="string">
            <text:p>casserol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cheese, beans, flour, vegetables, spices, herbs</text:p>
          </table:table-cell>
          <table:table-cell office:value-type="string">
            <text:p>Cheese x1, Beans x1, Flour x1, Vegetables x1, Spices x1, Herbs x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Vegetable Flatbread</text:p>
          </table:table-cell>
          <table:table-cell office:value-type="string">
            <text:p>flatbread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flour, vegetables, herbs, rice, beans, spices</text:p>
          </table:table-cell>
          <table:table-cell office:value-type="string">
            <text:p>Flour x1, Vegetables x1, Herbs x1, Rice x1, Beans x1, Spices x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Bean Pupusa</text:p>
          </table:table-cell>
          <table:table-cell office:value-type="string">
            <text:p>stuffed bread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flour, beans, cheese, vegetables, spices</text:p>
          </table:table-cell>
          <table:table-cell office:value-type="string">
            <text:p>Flour x2, Beans x1, Cheese x1, Vegetables x1, Spices x1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Herb Dumplings</text:p>
          </table:table-cell>
          <table:table-cell office:value-type="string">
            <text:p>dumplings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flour, herbs, vegetables, eggs</text:p>
          </table:table-cell>
          <table:table-cell office:value-type="string">
            <text:p>Flour x2, Herbs x2, Vegetables x1, Eggs x1</text:p>
          </table:table-cell>
        </table:table-row>
        <table:table-row>
          <table:table-cell office:value-type="string">
            <text:p>players_8_flour_followup_3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3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string">
            <text:p>Rice Pancakes</text:p>
          </table:table-cell>
          <table:table-cell office:value-type="string">
            <text:p>pancakes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flour, rice, eggs, vegetables, herbs, spices</text:p>
          </table:table-cell>
          <table:table-cell office:value-type="string">
            <text:p>Flour x1, Rice x1, Eggs x1, Vegetables x1, Herbs x1, Spices x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Herb Rice Bowl</text:p>
          </table:table-cell>
          <table:table-cell office:value-type="string">
            <text:p>rice bowl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herbs, eggs, cheese, vegetables, rice, spices</text:p>
          </table:table-cell>
          <table:table-cell office:value-type="string">
            <text:p>Herbs x1, Eggs x1, Cheese x1, Vegetables x1, Rice x1, Spices x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Green Rice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herbs, rice, vegetables, cheese, spices</text:p>
          </table:table-cell>
          <table:table-cell office:value-type="string">
            <text:p>Herbs x2, Rice x1, Vegetables x1, Cheese x1, Spices x1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Bean Herb Salad</text:p>
          </table:table-cell>
          <table:table-cell office:value-type="string">
            <text:p>salad</text:p>
          </table:table-cell>
          <table:table-cell office:value-type="string">
            <text:p>cup</text:p>
          </table:table-cell>
          <table:table-cell office:value-type="string">
            <text:p>cup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herbs, beans, vegetables, spices</text:p>
          </table:table-cell>
          <table:table-cell office:value-type="string">
            <text:p>Herbs x2, Beans x2, Vegetables x1, Spices x1</text:p>
          </table:table-cell>
        </table:table-row>
        <table:table-row>
          <table:table-cell office:value-type="string">
            <text:p>players_8_herbs_followup_3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3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string">
            <text:p>Herb Casserole</text:p>
          </table:table-cell>
          <table:table-cell office:value-type="string">
            <text:p>casserol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herbs, vegetables, cheese, flour, eggs, rice</text:p>
          </table:table-cell>
          <table:table-cell office:value-type="string">
            <text:p>Herbs x1, Vegetables x1, Cheese x1, Flour x1, Eggs x1, Rice x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Veg Fried Rice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vegetables, rice, eggs, spices, cheese, beans</text:p>
          </table:table-cell>
          <table:table-cell office:value-type="string">
            <text:p>Vegetables x1, Rice x1, Eggs x1, Spices x1, Cheese x1, Beans x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Vegetable Chili</text:p>
          </table:table-cell>
          <table:table-cell office:value-type="string">
            <text:p>chili</text:p>
          </table:table-cell>
          <table:table-cell office:value-type="string">
            <text:p>cup</text:p>
          </table:table-cell>
          <table:table-cell office:value-type="string">
            <text:p>cup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beans, vegetables, spices, cheese, herbs</text:p>
          </table:table-cell>
          <table:table-cell office:value-type="string">
            <text:p>Beans x2, Vegetables x1, Spices x1, Cheese x1, Herbs x1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Veggie Omelet</text:p>
          </table:table-cell>
          <table:table-cell office:value-type="string">
            <text:p>omelet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cheese, herbs, vegetables, eggs</text:p>
          </table:table-cell>
          <table:table-cell office:value-type="string">
            <text:p>Cheese x2, Herbs x2, Vegetables x1, Eggs x1</text:p>
          </table:table-cell>
        </table:table-row>
        <table:table-row>
          <table:table-cell office:value-type="string">
            <text:p>players_8_vegetables_followup_3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string">
            <text:p>Vegetable Pot Pie</text:p>
          </table:table-cell>
          <table:table-cell office:value-type="string">
            <text:p>pi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vegetables, flour, cheese, herbs, rice, beans</text:p>
          </table:table-cell>
          <table:table-cell office:value-type="string">
            <text:p>Vegetables x1, Flour x1, Cheese x1, Herbs x1, Rice x1, Beans x1</text:p>
          </table:table-cell>
        </table:table-row>
        <table:table-row>
          <table:table-cell office:value-type="string">
            <text:p>players_8_rice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Fried Rice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rice, eggs, vegetables, herbs, spices, beans</text:p>
          </table:table-cell>
          <table:table-cell office:value-type="string">
            <text:p>Rice x1, Eggs x1, Vegetables x1, Herbs x1, Spices x1, Beans x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 Bean Bowl</text:p>
          </table:table-cell>
          <table:table-cell office:value-type="string">
            <text:p>rice bowl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rice, beans, vegetables, spices, cheese</text:p>
          </table:table-cell>
          <table:table-cell office:value-type="string">
            <text:p>Rice x2, Beans x1, Vegetables x1, Spices x1, Cheese x1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 Cakes</text:p>
          </table:table-cell>
          <table:table-cell office:value-type="string">
            <text:p>rice cake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rice, cheese, eggs, herbs</text:p>
          </table:table-cell>
          <table:table-cell office:value-type="string">
            <text:p>Rice x2, Cheese x2, Eggs x1, Herbs x1</text:p>
          </table:table-cell>
        </table:table-row>
        <table:table-row>
          <table:table-cell office:value-type="string">
            <text:p>players_8_rice_followup_3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3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 Casserole</text:p>
          </table:table-cell>
          <table:table-cell office:value-type="string">
            <text:p>casserol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rice, vegetables, cheese, flour, herbs, spices</text:p>
          </table:table-cell>
          <table:table-cell office:value-type="string">
            <text:p>Rice x1, Vegetables x1, Cheese x1, Flour x1, Herbs x1, Spices x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Bean Shakshuka</text:p>
          </table:table-cell>
          <table:table-cell office:value-type="string">
            <text:p>bean stew</text:p>
          </table:table-cell>
          <table:table-cell office:value-type="string">
            <text:p>cup</text:p>
          </table:table-cell>
          <table:table-cell office:value-type="string">
            <text:p>cu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beans, vegetables, spices, eggs, herbs, cheese</text:p>
          </table:table-cell>
          <table:table-cell office:value-type="string">
            <text:p>Beans x1, Vegetables x1, Spices x1, Eggs x1, Herbs x1, Cheese x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Bean Burrito</text:p>
          </table:table-cell>
          <table:table-cell office:value-type="string">
            <text:p>wrap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beans, flour, cheese, vegetables, spices</text:p>
          </table:table-cell>
          <table:table-cell office:value-type="string">
            <text:p>Beans x2, Flour x1, Cheese x1, Vegetables x1, Spices x1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Bean Dip</text:p>
          </table:table-cell>
          <table:table-cell office:value-type="string">
            <text:p>dip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beans, cheese, spices, herbs</text:p>
          </table:table-cell>
          <table:table-cell office:value-type="string">
            <text:p>Beans x2, Cheese x2, Spices x1, Herbs x1</text:p>
          </table:table-cell>
        </table:table-row>
        <table:table-row>
          <table:table-cell office:value-type="string">
            <text:p>players_8_beans_followup_3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3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string">
            <text:p>Bean Egg Skillet</text:p>
          </table:table-cell>
          <table:table-cell office:value-type="string">
            <text:p>skillet</text:p>
          </table:table-cell>
          <table:table-cell office:value-type="string">
            <text:p>serving</text:p>
          </table:table-cell>
          <table:table-cell office:value-type="string">
            <text:p>serving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beans, eggs, vegetables, cheese, flour, herbs</text:p>
          </table:table-cell>
          <table:table-cell office:value-type="string">
            <text:p>Beans x1, Eggs x1, Vegetables x1, Cheese x1, Flour x1, Herbs x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Spiced Rice Pilaf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spices, rice, vegetables, herbs, beans, cheese</text:p>
          </table:table-cell>
          <table:table-cell office:value-type="string">
            <text:p>Spices x1, Rice x1, Vegetables x1, Herbs x1, Beans x1, Cheese x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Bean Tacos</text:p>
          </table:table-cell>
          <table:table-cell office:value-type="string">
            <text:p>tacos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spices, beans, flour, vegetables, cheese</text:p>
          </table:table-cell>
          <table:table-cell office:value-type="string">
            <text:p>Spices x2, Beans x1, Flour x1, Vegetables x1, Cheese x1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Masala Omelet</text:p>
          </table:table-cell>
          <table:table-cell office:value-type="string">
            <text:p>omelet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spices, eggs, vegetables, herbs</text:p>
          </table:table-cell>
          <table:table-cell office:value-type="string">
            <text:p>Spices x2, Eggs x2, Vegetables x1, Herbs x1</text:p>
          </table:table-cell>
        </table:table-row>
        <table:table-row>
          <table:table-cell office:value-type="string">
            <text:p>players_8_spices_followup_3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3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string">
            <text:p>Spiced Pancakes</text:p>
          </table:table-cell>
          <table:table-cell office:value-type="string">
            <text:p>pancakes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spices, flour, eggs, vegetables, rice, beans</text:p>
          </table:table-cell>
          <table:table-cell office:value-type="string">
            <text:p>Spices x1, Flour x1, Eggs x1, Vegetables x1, Rice x1, Beans x1</text:p>
          </table:table-cell>
        </table:table-row>
        <table:table-row>
          <table:table-cell office:value-type="string">
            <text:p>players_8_eggs_initial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initial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Breakfast Burrito</text:p>
          </table:table-cell>
          <table:table-cell office:value-type="string">
            <text:p>wrap</text:p>
          </table:table-cell>
          <table:table-cell office:value-type="string">
            <text:p>piece</text:p>
          </table:table-cell>
          <table:table-cell office:value-type="string">
            <text:p>pie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eggs, flour, cheese, vegetables, beans, spices</text:p>
          </table:table-cell>
          <table:table-cell office:value-type="string">
            <text:p>Eggs x1, Flour x1, Cheese x1, Vegetables x1, Beans x1, Spices x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Egg Fried Rice</text:p>
          </table:table-cell>
          <table:table-cell office:value-type="string">
            <text:p>rice dish</text:p>
          </table:table-cell>
          <table:table-cell office:value-type="string">
            <text:p>scoop</text:p>
          </table:table-cell>
          <table:table-cell office:value-type="string">
            <text:p>scoop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ne_double_four_singles</text:p>
          </table:table-cell>
          <table:table-cell office:value-type="string">
            <text:p>eggs, rice, vegetables, herbs, spices</text:p>
          </table:table-cell>
          <table:table-cell office:value-type="string">
            <text:p>Eggs x2, Rice x1, Vegetables x1, Herbs x1, Spices x1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Cheese Omelet</text:p>
          </table:table-cell>
          <table:table-cell office:value-type="string">
            <text:p>omelet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wo_doubles_two_singles</text:p>
          </table:table-cell>
          <table:table-cell office:value-type="string">
            <text:p>eggs, cheese, herbs, vegetables</text:p>
          </table:table-cell>
          <table:table-cell office:value-type="string">
            <text:p>Eggs x2, Cheese x2, Herbs x1, Vegetables x1</text:p>
          </table:table-cell>
        </table:table-row>
        <table:table-row>
          <table:table-cell office:value-type="string">
            <text:p>players_8_eggs_followup_3</text:p>
          </table:table-cell>
          <table:table-cell office:value-type="string">
            <text:p>players_8</text:p>
          </table:table-cell>
          <table:table-cell office:value-type="float" office:value="8">
            <text:p>8</text:p>
          </table:table-cell>
          <table:table-cell office:value-type="string">
            <text:p>followup_3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string">
            <text:p>Egg Casserole</text:p>
          </table:table-cell>
          <table:table-cell office:value-type="string">
            <text:p>casserole</text:p>
          </table:table-cell>
          <table:table-cell office:value-type="string">
            <text:p>slice</text:p>
          </table:table-cell>
          <table:table-cell office:value-type="string">
            <text:p>slic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x_singles</text:p>
          </table:table-cell>
          <table:table-cell office:value-type="string">
            <text:p>eggs, cheese, vegetables, flour, rice, beans</text:p>
          </table:table-cell>
          <table:table-cell office:value-type="string">
            <text:p>Eggs x1, Cheese x1, Vegetables x1, Flour x1, Rice x1, Beans x1</text:p>
          </table:table-cell>
        </table:table-row>
      </table:table>
      <table:table table:name="Player Count Requirements">
        <table:table-row>
          <table:table-cell office:value-type="string">
            <text:p>recipe_id</text:p>
          </table:table-cell>
          <table:table-cell office:value-type="string">
            <text:p>position</text:p>
          </table:table-cell>
          <table:table-cell office:value-type="string">
            <text:p>ingredient_id</text:p>
          </table:table-cell>
          <table:table-cell office:value-type="string">
            <text:p>ingredient_name</text:p>
          </table:table-cell>
          <table:table-cell office:value-type="string">
            <text:p>required_qty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float" office:value="6">
            <text:p>6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4">
            <text:p>4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3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3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3</text:p>
          </table:table-cell>
          <table:table-cell office:value-type="float" office:value="3">
            <text:p>3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3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3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cheese_followup_3</text:p>
          </table:table-cell>
          <table:table-cell office:value-type="float" office:value="6">
            <text:p>6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1">
            <text:p>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2">
            <text:p>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3">
            <text:p>3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4">
            <text:p>4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5">
            <text:p>5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initial</text:p>
          </table:table-cell>
          <table:table-cell office:value-type="float" office:value="6">
            <text:p>6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1">
            <text:p>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float" office:value="1">
            <text:p>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float" office:value="2">
            <text:p>2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float" office:value="4">
            <text:p>4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3</text:p>
          </table:table-cell>
          <table:table-cell office:value-type="float" office:value="1">
            <text:p>1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3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3</text:p>
          </table:table-cell>
          <table:table-cell office:value-type="float" office:value="3">
            <text:p>3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3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3</text:p>
          </table:table-cell>
          <table:table-cell office:value-type="float" office:value="5">
            <text:p>5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flour_followup_3</text:p>
          </table:table-cell>
          <table:table-cell office:value-type="float" office:value="6">
            <text:p>6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1">
            <text:p>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5">
            <text:p>5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initial</text:p>
          </table:table-cell>
          <table:table-cell office:value-type="float" office:value="6">
            <text:p>6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1">
            <text:p>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4">
            <text:p>4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float" office:value="1">
            <text:p>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float" office:value="4">
            <text:p>4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3</text:p>
          </table:table-cell>
          <table:table-cell office:value-type="float" office:value="1">
            <text:p>1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3</text:p>
          </table:table-cell>
          <table:table-cell office:value-type="float" office:value="2">
            <text:p>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3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3</text:p>
          </table:table-cell>
          <table:table-cell office:value-type="float" office:value="4">
            <text:p>4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3</text:p>
          </table:table-cell>
          <table:table-cell office:value-type="float" office:value="5">
            <text:p>5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herbs_followup_3</text:p>
          </table:table-cell>
          <table:table-cell office:value-type="float" office:value="6">
            <text:p>6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1">
            <text:p>1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3">
            <text:p>3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4">
            <text:p>4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5">
            <text:p>5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2">
            <text:p>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3">
            <text:p>3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4">
            <text:p>4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float" office:value="5">
            <text:p>5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float" office:value="2">
            <text:p>2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float" office:value="4">
            <text:p>4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3</text:p>
          </table:table-cell>
          <table:table-cell office:value-type="float" office:value="1">
            <text:p>1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3</text:p>
          </table:table-cell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3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3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3</text:p>
          </table:table-cell>
          <table:table-cell office:value-type="float" office:value="5">
            <text:p>5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vegetables_followup_3</text:p>
          </table:table-cell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initial</text:p>
          </table:table-cell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4">
            <text:p>4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float" office:value="5">
            <text:p>5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float" office:value="2">
            <text:p>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float" office:value="3">
            <text:p>3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3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3</text:p>
          </table:table-cell>
          <table:table-cell office:value-type="float" office:value="2">
            <text:p>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3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3</text:p>
          </table:table-cell>
          <table:table-cell office:value-type="float" office:value="4">
            <text:p>4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3</text:p>
          </table:table-cell>
          <table:table-cell office:value-type="float" office:value="5">
            <text:p>5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rice_followup_3</text:p>
          </table:table-cell>
          <table:table-cell office:value-type="float" office:value="6">
            <text:p>6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2">
            <text:p>2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3">
            <text:p>3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4">
            <text:p>4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5">
            <text:p>5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initial</text:p>
          </table:table-cell>
          <table:table-cell office:value-type="float" office:value="6">
            <text:p>6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float" office:value="2">
            <text:p>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float" office:value="3">
            <text:p>3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3</text:p>
          </table:table-cell>
          <table:table-cell office:value-type="float" office:value="1">
            <text:p>1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3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3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3</text:p>
          </table:table-cell>
          <table:table-cell office:value-type="float" office:value="4">
            <text:p>4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3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beans_followup_3</text:p>
          </table:table-cell>
          <table:table-cell office:value-type="float" office:value="6">
            <text:p>6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1">
            <text:p>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5">
            <text:p>5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float" office:value="6">
            <text:p>6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1">
            <text:p>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2">
            <text:p>2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3">
            <text:p>3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float" office:value="5">
            <text:p>5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float" office:value="1">
            <text:p>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float" office:value="2">
            <text:p>2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3</text:p>
          </table:table-cell>
          <table:table-cell office:value-type="float" office:value="1">
            <text:p>1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3</text:p>
          </table:table-cell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3</text:p>
          </table:table-cell>
          <table:table-cell office:value-type="float" office:value="3">
            <text:p>3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3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3</text:p>
          </table:table-cell>
          <table:table-cell office:value-type="float" office:value="5">
            <text:p>5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spices_followup_3</text:p>
          </table:table-cell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1">
            <text:p>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3">
            <text:p>3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5">
            <text:p>5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initial</text:p>
          </table:table-cell>
          <table:table-cell office:value-type="float" office:value="6">
            <text:p>6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1">
            <text:p>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2">
            <text:p>2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4">
            <text:p>4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float" office:value="5">
            <text:p>5</text:p>
          </table:table-cell>
          <table:table-cell office:value-type="string">
            <text:p>spices</text:p>
          </table:table-cell>
          <table:table-cell office:value-type="string">
            <text:p>Spic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float" office:value="1">
            <text:p>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float" office:value="2">
            <text:p>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float" office:value="3">
            <text:p>3</text:p>
          </table:table-cell>
          <table:table-cell office:value-type="string">
            <text:p>herbs</text:p>
          </table:table-cell>
          <table:table-cell office:value-type="string">
            <text:p>Herb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float" office:value="4">
            <text:p>4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3</text:p>
          </table:table-cell>
          <table:table-cell office:value-type="float" office:value="1">
            <text:p>1</text:p>
          </table:table-cell>
          <table:table-cell office:value-type="string">
            <text:p>eggs</text:p>
          </table:table-cell>
          <table:table-cell office:value-type="string">
            <text:p>Eg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3</text:p>
          </table:table-cell>
          <table:table-cell office:value-type="float" office:value="2">
            <text:p>2</text:p>
          </table:table-cell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3</text:p>
          </table:table-cell>
          <table:table-cell office:value-type="float" office:value="3">
            <text:p>3</text:p>
          </table:table-cell>
          <table:table-cell office:value-type="string">
            <text:p>vegetables</text:p>
          </table:table-cell>
          <table:table-cell office:value-type="string">
            <text:p>Vegetab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3</text:p>
          </table:table-cell>
          <table:table-cell office:value-type="float" office:value="4">
            <text:p>4</text:p>
          </table:table-cell>
          <table:table-cell office:value-type="string">
            <text:p>flour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3</text:p>
          </table:table-cell>
          <table:table-cell office:value-type="float" office:value="5">
            <text:p>5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yers_8_eggs_followup_3</text:p>
          </table:table-cell>
          <table:table-cell office:value-type="float" office:value="6">
            <text:p>6</text:p>
          </table:table-cell>
          <table:table-cell office:value-type="string">
            <text:p>beans</text:p>
          </table:table-cell>
          <table:table-cell office:value-type="string">
            <text:p>Beans</text:p>
          </table:table-cell>
          <table:table-cell office:value-type="float" office:value="1">
            <text:p>1</text:p>
          </table:table-cell>
        </table:table-row>
      </table:table>
      <table:table table:name="Validation">
        <table:table-row>
          <table:table-cell office:value-type="string">
            <text:p>recipe_id</text:p>
          </table:table-cell>
          <table:table-cell office:value-type="string">
            <text:p>quantity_total_ok</text:p>
          </table:table-cell>
          <table:table-cell office:value-type="string">
            <text:p>distinct_allowed_ok</text:p>
          </table:table-cell>
          <table:table-cell office:value-type="string">
            <text:p>quantity_shape_ok</text:p>
          </table:table-cell>
          <table:table-cell office:value-type="string">
            <text:p>owner_included_ok</text:p>
          </table:table-cell>
          <table:table-cell office:value-type="string">
            <text:p>active_ingredients_only_ok</text:p>
          </table:table-cell>
          <table:table-cell office:value-type="string">
            <text:p>unique_requirements_ok</text:p>
          </table:table-cell>
          <table:table-cell office:value-type="string">
            <text:p>unique_name_ok</text:p>
          </table:table-cell>
          <table:table-cell office:value-type="string">
            <text:p>catalog_demand_within_stock_ok</text:p>
          </table:table-cell>
          <table:table-cell office:value-type="string">
            <text:p>fallback_free_ok</text:p>
          </table:table-cell>
          <table:table-cell office:value-type="string">
            <text:p>accurate_name_ok</text:p>
          </table:table-cell>
          <table:table-cell office:value-type="string">
            <text:p>serving_unit_ok</text:p>
          </table:table-cell>
        </table:table-row>
        <table:table-row>
          <table:table-cell office:value-type="string">
            <text:p>players_8_cheese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cheese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cheese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cheese_followup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flour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flour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flour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flour_followup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herb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herb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herb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herbs_followup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vegetable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vegetable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vegetable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vegetables_followup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rice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rice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rice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rice_followup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bean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bean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bean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beans_followup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spice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spice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spice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spices_followup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eggs_initi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eggs_followup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eggs_followup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yers_8_eggs_followup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