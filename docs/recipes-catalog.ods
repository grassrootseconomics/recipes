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office:version="1.2">
  <office:body>
    <office:spreadsheet>
      <table:table table:name="Ingredients">
        <table:table-row>
          <table:table-cell office:value-type="string">
            <text:p>catalog_order</text:p>
          </table:table-cell>
          <table:table-cell office:value-type="string">
            <text:p>ingredient_id</text:p>
          </table:table-cell>
          <table:table-cell office:value-type="string">
            <text:p>ingredient_name</text:p>
          </table:table-cell>
          <table:table-cell office:value-type="string">
            <text:p>description</text:p>
          </table:table-cell>
          <table:table-cell office:value-type="string">
            <text:p>image_path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string">
            <text:p>Melts, toppings, fillings, casseroles</text:p>
          </table:table-cell>
          <table:table-cell office:value-type="string">
            <text:p>art/ingredients/cheese_64.png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flour</text:p>
          </table:table-cell>
          <table:table-cell office:value-type="string">
            <text:p>Flour</text:p>
          </table:table-cell>
          <table:table-cell office:value-type="string">
            <text:p>Bread, tortillas, pancakes, dumplings, thickening</text:p>
          </table:table-cell>
          <table:table-cell office:value-type="string">
            <text:p>art/ingredients/flour_open_sack_64.png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herbs</text:p>
          </table:table-cell>
          <table:table-cell office:value-type="string">
            <text:p>Herbs</text:p>
          </table:table-cell>
          <table:table-cell office:value-type="string">
            <text:p>Basil, parsley, cilantro, oregano, thyme</text:p>
          </table:table-cell>
          <table:table-cell office:value-type="string">
            <text:p>art/ingredients/herbs_64.png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vegetables</text:p>
          </table:table-cell>
          <table:table-cell office:value-type="string">
            <text:p>Vegetables</text:p>
          </table:table-cell>
          <table:table-cell office:value-type="string">
            <text:p>Onions, peppers, carrots, tomatoes, spinach, etc.</text:p>
          </table:table-cell>
          <table:table-cell office:value-type="string">
            <text:p>art/ingredients/vegetables_64.png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string">
            <text:p>Bowls, fried rice, casseroles, sides</text:p>
          </table:table-cell>
          <table:table-cell office:value-type="string">
            <text:p>art/ingredients/rice_64.png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beans</text:p>
          </table:table-cell>
          <table:table-cell office:value-type="string">
            <text:p>Beans</text:p>
          </table:table-cell>
          <table:table-cell office:value-type="string">
            <text:p>Chili, tacos, stews, bowls, dips</text:p>
          </table:table-cell>
          <table:table-cell office:value-type="string">
            <text:p>art/ingredients/beans_64.png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spices</text:p>
          </table:table-cell>
          <table:table-cell office:value-type="string">
            <text:p>Spices</text:p>
          </table:table-cell>
          <table:table-cell office:value-type="string">
            <text:p>Salt, pepper, cumin, paprika, chili powder, curry powder</text:p>
          </table:table-cell>
          <table:table-cell office:value-type="string">
            <text:p>art/ingredients/spices_64.png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eggs</text:p>
          </table:table-cell>
          <table:table-cell office:value-type="string">
            <text:p>Eggs</text:p>
          </table:table-cell>
          <table:table-cell office:value-type="string">
            <text:p>Breakfasts, fried rice, baking, binders, toppings</text:p>
          </table:table-cell>
          <table:table-cell office:value-type="string">
            <text:p>art/ingredients/eggs_64.png</text:p>
          </table:table-cell>
        </table:table-row>
      </table:table>
      <table:table table:name="Player Count Ingredient Sets">
        <table:table-row>
          <table:table-cell office:value-type="string">
            <text:p>configuration_id</text:p>
          </table:table-cell>
          <table:table-cell office:value-type="string">
            <text:p>player_count</text:p>
          </table:table-cell>
          <table:table-cell office:value-type="string">
            <text:p>ingredient_count</text:p>
          </table:table-cell>
          <table:table-cell office:value-type="string">
            <text:p>ingredient_ids</text:p>
          </table:table-cell>
          <table:table-cell office:value-type="string">
            <text:p>ingredient_names</text:p>
          </table:table-cell>
          <table:table-cell office:value-type="string">
            <text:p>recipes_per_ingredient</text:p>
          </table:table-cell>
          <table:table-cell office:value-type="string">
            <text:p>total_recipes</text:p>
          </table:table-cell>
          <table:table-cell office:value-type="string">
            <text:p>required_items_per_recipe</text:p>
          </table:table-cell>
          <table:table-cell office:value-type="string">
            <text:p>opening_offerings_per_player</text:p>
          </table:table-cell>
          <table:table-cell office:value-type="string">
            <text:p>vouchers_per_ingredient</text:p>
          </table:table-cell>
          <table:table-cell office:value-type="string">
            <text:p>real_units_per_ingredient</text:p>
          </table:table-cell>
          <table:table-cell office:value-type="string">
            <text:p>max_catalog_demand_per_ingredient</text:p>
          </table:table-cell>
          <table:table-cell office:value-type="string">
            <text:p>allowed_distinct_ingredient_counts</text:p>
          </table:table-cell>
        </table:table-row>
        <table:table-row>
          <table:table-cell office:value-type="string">
            <text:p>players_8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>
            <text:p>cheese, flour, herbs, vegetables, rice, beans, spices, eggs</text:p>
          </table:table-cell>
          <table:table-cell office:value-type="string">
            <text:p>Cheese, Flour, Herbs, Vegetables, Rice, Beans, Spices, Eggs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string">
            <text:p>4, 5, 6</text:p>
          </table:table-cell>
        </table:table-row>
      </table:table>
      <table:table table:name="Player Count Recipes">
        <table:table-row>
          <table:table-cell office:value-type="string">
            <text:p>recipe_id</text:p>
          </table:table-cell>
          <table:table-cell office:value-type="string">
            <text:p>configuration_id</text:p>
          </table:table-cell>
          <table:table-cell office:value-type="string">
            <text:p>player_count</text:p>
          </table:table-cell>
          <table:table-cell office:value-type="string">
            <text:p>slot</text:p>
          </table:table-cell>
          <table:table-cell office:value-type="string">
            <text:p>owner_ingredient_id</text:p>
          </table:table-cell>
          <table:table-cell office:value-type="string">
            <text:p>owner_ingredient_name</text:p>
          </table:table-cell>
          <table:table-cell office:value-type="string">
            <text:p>dish_name</text:p>
          </table:table-cell>
          <table:table-cell office:value-type="string">
            <text:p>dish_family</text:p>
          </table:table-cell>
          <table:table-cell office:value-type="string">
            <text:p>part_unit_singular</text:p>
          </table:table-cell>
          <table:table-cell office:value-type="string">
            <text:p>part_unit_plural</text:p>
          </table:table-cell>
          <table:table-cell office:value-type="string">
            <text:p>total_required_qty</text:p>
          </table:table-cell>
          <table:table-cell office:value-type="string">
            <text:p>distinct_ingredient_count</text:p>
          </table:table-cell>
          <table:table-cell office:value-type="string">
            <text:p>quantity_shape</text:p>
          </table:table-cell>
          <table:table-cell office:value-type="string">
            <text:p>ingredient_ids</text:p>
          </table:table-cell>
          <table:table-cell office:value-type="string">
            <text:p>requirements</text:p>
          </table:table-cell>
        </table:table-row>
        <table:table-row>
          <table:table-cell office:value-type="string">
            <text:p>players_8_cheese_initial</text:p>
          </table:table-cell>
          <table:table-cell office:value-type="string">
            <text:p>players_8</text:p>
          </table:table-cell>
          <table:table-cell office:value-type="float" office:value="8">
            <text:p>8</text:p>
          </table:table-cell>
          <table:table-cell office:value-type="string">
            <text:p>initial</text:p>
          </table:table-cell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string">
            <text:p>Cheese Frittata</text:p>
          </table:table-cell>
          <table:table-cell office:value-type="string">
            <text:p>egg bake</text:p>
          </table:table-cell>
          <table:table-cell office:value-type="string">
            <text:p>slice</text:p>
          </table:table-cell>
          <table:table-cell office:value-type="string">
            <text:p>slices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string">
            <text:p>six_singles</text:p>
          </table:table-cell>
          <table:table-cell office:value-type="string">
            <text:p>cheese, eggs, vegetables, herbs, spices, flour</text:p>
          </table:table-cell>
          <table:table-cell office:value-type="string">
            <text:p>Cheese x1, Eggs x1, Vegetables x1, Herbs x1, Spices x1, Flour x1</text:p>
          </table:table-cell>
        </table:table-row>
        <table:table-row>
          <table:table-cell office:value-type="string">
            <text:p>players_8_cheese_followup_1</text:p>
          </table:table-cell>
          <table:table-cell office:value-type="string">
            <text:p>players_8</text:p>
          </table:table-cell>
          <table:table-cell office:value-type="float" office:value="8">
            <text:p>8</text:p>
          </table:table-cell>
          <table:table-cell office:value-type="string">
            <text:p>followup_1</text:p>
          </table:table-cell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string">
            <text:p>Cheese Quesadilla</text:p>
          </table:table-cell>
          <table:table-cell office:value-type="string">
            <text:p>flatbread</text:p>
          </table:table-cell>
          <table:table-cell office:value-type="string">
            <text:p>piece</text:p>
          </table:table-cell>
          <table:table-cell office:value-type="string">
            <text:p>pieces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one_double_four_singles</text:p>
          </table:table-cell>
          <table:table-cell office:value-type="string">
            <text:p>cheese, flour, vegetables, beans, spices</text:p>
          </table:table-cell>
          <table:table-cell office:value-type="string">
            <text:p>Cheese x2, Flour x1, Vegetables x1, Beans x1, Spices x1</text:p>
          </table:table-cell>
        </table:table-row>
        <table:table-row>
          <table:table-cell office:value-type="string">
            <text:p>players_8_cheese_followup_2</text:p>
          </table:table-cell>
          <table:table-cell office:value-type="string">
            <text:p>players_8</text:p>
          </table:table-cell>
          <table:table-cell office:value-type="float" office:value="8">
            <text:p>8</text:p>
          </table:table-cell>
          <table:table-cell office:value-type="string">
            <text:p>followup_2</text:p>
          </table:table-cell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string">
            <text:p>Cheesy Rice Bake</text:p>
          </table:table-cell>
          <table:table-cell office:value-type="string">
            <text:p>casserole</text:p>
          </table:table-cell>
          <table:table-cell office:value-type="string">
            <text:p>slice</text:p>
          </table:table-cell>
          <table:table-cell office:value-type="string">
            <text:p>slices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two_doubles_two_singles</text:p>
          </table:table-cell>
          <table:table-cell office:value-type="string">
            <text:p>cheese, rice, vegetables, herbs</text:p>
          </table:table-cell>
          <table:table-cell office:value-type="string">
            <text:p>Cheese x2, Rice x2, Vegetables x1, Herbs x1</text:p>
          </table:table-cell>
        </table:table-row>
        <table:table-row>
          <table:table-cell office:value-type="string">
            <text:p>players_8_flour_initial</text:p>
          </table:table-cell>
          <table:table-cell office:value-type="string">
            <text:p>players_8</text:p>
          </table:table-cell>
          <table:table-cell office:value-type="float" office:value="8">
            <text:p>8</text:p>
          </table:table-cell>
          <table:table-cell office:value-type="string">
            <text:p>initial</text:p>
          </table:table-cell>
          <table:table-cell office:value-type="string">
            <text:p>flour</text:p>
          </table:table-cell>
          <table:table-cell office:value-type="string">
            <text:p>Flour</text:p>
          </table:table-cell>
          <table:table-cell office:value-type="string">
            <text:p>Vegetable Flatbread</text:p>
          </table:table-cell>
          <table:table-cell office:value-type="string">
            <text:p>flatbread</text:p>
          </table:table-cell>
          <table:table-cell office:value-type="string">
            <text:p>slice</text:p>
          </table:table-cell>
          <table:table-cell office:value-type="string">
            <text:p>slices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string">
            <text:p>six_singles</text:p>
          </table:table-cell>
          <table:table-cell office:value-type="string">
            <text:p>flour, vegetables, herbs, rice, beans, spices</text:p>
          </table:table-cell>
          <table:table-cell office:value-type="string">
            <text:p>Flour x1, Vegetables x1, Herbs x1, Rice x1, Beans x1, Spices x1</text:p>
          </table:table-cell>
        </table:table-row>
        <table:table-row>
          <table:table-cell office:value-type="string">
            <text:p>players_8_flour_followup_1</text:p>
          </table:table-cell>
          <table:table-cell office:value-type="string">
            <text:p>players_8</text:p>
          </table:table-cell>
          <table:table-cell office:value-type="float" office:value="8">
            <text:p>8</text:p>
          </table:table-cell>
          <table:table-cell office:value-type="string">
            <text:p>followup_1</text:p>
          </table:table-cell>
          <table:table-cell office:value-type="string">
            <text:p>flour</text:p>
          </table:table-cell>
          <table:table-cell office:value-type="string">
            <text:p>Flour</text:p>
          </table:table-cell>
          <table:table-cell office:value-type="string">
            <text:p>Bean Pupusa</text:p>
          </table:table-cell>
          <table:table-cell office:value-type="string">
            <text:p>stuffed bread</text:p>
          </table:table-cell>
          <table:table-cell office:value-type="string">
            <text:p>piece</text:p>
          </table:table-cell>
          <table:table-cell office:value-type="string">
            <text:p>pieces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one_double_four_singles</text:p>
          </table:table-cell>
          <table:table-cell office:value-type="string">
            <text:p>flour, beans, cheese, vegetables, spices</text:p>
          </table:table-cell>
          <table:table-cell office:value-type="string">
            <text:p>Flour x2, Beans x1, Cheese x1, Vegetables x1, Spices x1</text:p>
          </table:table-cell>
        </table:table-row>
        <table:table-row>
          <table:table-cell office:value-type="string">
            <text:p>players_8_flour_followup_2</text:p>
          </table:table-cell>
          <table:table-cell office:value-type="string">
            <text:p>players_8</text:p>
          </table:table-cell>
          <table:table-cell office:value-type="float" office:value="8">
            <text:p>8</text:p>
          </table:table-cell>
          <table:table-cell office:value-type="string">
            <text:p>followup_2</text:p>
          </table:table-cell>
          <table:table-cell office:value-type="string">
            <text:p>flour</text:p>
          </table:table-cell>
          <table:table-cell office:value-type="string">
            <text:p>Flour</text:p>
          </table:table-cell>
          <table:table-cell office:value-type="string">
            <text:p>Herb Dumplings</text:p>
          </table:table-cell>
          <table:table-cell office:value-type="string">
            <text:p>dumplings</text:p>
          </table:table-cell>
          <table:table-cell office:value-type="string">
            <text:p>piece</text:p>
          </table:table-cell>
          <table:table-cell office:value-type="string">
            <text:p>pieces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two_doubles_two_singles</text:p>
          </table:table-cell>
          <table:table-cell office:value-type="string">
            <text:p>flour, herbs, vegetables, eggs</text:p>
          </table:table-cell>
          <table:table-cell office:value-type="string">
            <text:p>Flour x2, Herbs x2, Vegetables x1, Eggs x1</text:p>
          </table:table-cell>
        </table:table-row>
        <table:table-row>
          <table:table-cell office:value-type="string">
            <text:p>players_8_herbs_initial</text:p>
          </table:table-cell>
          <table:table-cell office:value-type="string">
            <text:p>players_8</text:p>
          </table:table-cell>
          <table:table-cell office:value-type="float" office:value="8">
            <text:p>8</text:p>
          </table:table-cell>
          <table:table-cell office:value-type="string">
            <text:p>initial</text:p>
          </table:table-cell>
          <table:table-cell office:value-type="string">
            <text:p>herbs</text:p>
          </table:table-cell>
          <table:table-cell office:value-type="string">
            <text:p>Herbs</text:p>
          </table:table-cell>
          <table:table-cell office:value-type="string">
            <text:p>Herb Rice Bowl</text:p>
          </table:table-cell>
          <table:table-cell office:value-type="string">
            <text:p>rice bowl</text:p>
          </table:table-cell>
          <table:table-cell office:value-type="string">
            <text:p>scoop</text:p>
          </table:table-cell>
          <table:table-cell office:value-type="string">
            <text:p>scoops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string">
            <text:p>six_singles</text:p>
          </table:table-cell>
          <table:table-cell office:value-type="string">
            <text:p>herbs, eggs, cheese, vegetables, rice, spices</text:p>
          </table:table-cell>
          <table:table-cell office:value-type="string">
            <text:p>Herbs x1, Eggs x1, Cheese x1, Vegetables x1, Rice x1, Spices x1</text:p>
          </table:table-cell>
        </table:table-row>
        <table:table-row>
          <table:table-cell office:value-type="string">
            <text:p>players_8_herbs_followup_1</text:p>
          </table:table-cell>
          <table:table-cell office:value-type="string">
            <text:p>players_8</text:p>
          </table:table-cell>
          <table:table-cell office:value-type="float" office:value="8">
            <text:p>8</text:p>
          </table:table-cell>
          <table:table-cell office:value-type="string">
            <text:p>followup_1</text:p>
          </table:table-cell>
          <table:table-cell office:value-type="string">
            <text:p>herbs</text:p>
          </table:table-cell>
          <table:table-cell office:value-type="string">
            <text:p>Herbs</text:p>
          </table:table-cell>
          <table:table-cell office:value-type="string">
            <text:p>Green Rice</text:p>
          </table:table-cell>
          <table:table-cell office:value-type="string">
            <text:p>rice dish</text:p>
          </table:table-cell>
          <table:table-cell office:value-type="string">
            <text:p>scoop</text:p>
          </table:table-cell>
          <table:table-cell office:value-type="string">
            <text:p>scoops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one_double_four_singles</text:p>
          </table:table-cell>
          <table:table-cell office:value-type="string">
            <text:p>herbs, rice, vegetables, cheese, spices</text:p>
          </table:table-cell>
          <table:table-cell office:value-type="string">
            <text:p>Herbs x2, Rice x1, Vegetables x1, Cheese x1, Spices x1</text:p>
          </table:table-cell>
        </table:table-row>
        <table:table-row>
          <table:table-cell office:value-type="string">
            <text:p>players_8_herbs_followup_2</text:p>
          </table:table-cell>
          <table:table-cell office:value-type="string">
            <text:p>players_8</text:p>
          </table:table-cell>
          <table:table-cell office:value-type="float" office:value="8">
            <text:p>8</text:p>
          </table:table-cell>
          <table:table-cell office:value-type="string">
            <text:p>followup_2</text:p>
          </table:table-cell>
          <table:table-cell office:value-type="string">
            <text:p>herbs</text:p>
          </table:table-cell>
          <table:table-cell office:value-type="string">
            <text:p>Herbs</text:p>
          </table:table-cell>
          <table:table-cell office:value-type="string">
            <text:p>Bean Herb Salad</text:p>
          </table:table-cell>
          <table:table-cell office:value-type="string">
            <text:p>salad</text:p>
          </table:table-cell>
          <table:table-cell office:value-type="string">
            <text:p>cup</text:p>
          </table:table-cell>
          <table:table-cell office:value-type="string">
            <text:p>cups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two_doubles_two_singles</text:p>
          </table:table-cell>
          <table:table-cell office:value-type="string">
            <text:p>herbs, beans, vegetables, spices</text:p>
          </table:table-cell>
          <table:table-cell office:value-type="string">
            <text:p>Herbs x2, Beans x2, Vegetables x1, Spices x1</text:p>
          </table:table-cell>
        </table:table-row>
        <table:table-row>
          <table:table-cell office:value-type="string">
            <text:p>players_8_vegetables_initial</text:p>
          </table:table-cell>
          <table:table-cell office:value-type="string">
            <text:p>players_8</text:p>
          </table:table-cell>
          <table:table-cell office:value-type="float" office:value="8">
            <text:p>8</text:p>
          </table:table-cell>
          <table:table-cell office:value-type="string">
            <text:p>initial</text:p>
          </table:table-cell>
          <table:table-cell office:value-type="string">
            <text:p>vegetables</text:p>
          </table:table-cell>
          <table:table-cell office:value-type="string">
            <text:p>Vegetables</text:p>
          </table:table-cell>
          <table:table-cell office:value-type="string">
            <text:p>Veg Fried Rice</text:p>
          </table:table-cell>
          <table:table-cell office:value-type="string">
            <text:p>rice dish</text:p>
          </table:table-cell>
          <table:table-cell office:value-type="string">
            <text:p>scoop</text:p>
          </table:table-cell>
          <table:table-cell office:value-type="string">
            <text:p>scoops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string">
            <text:p>six_singles</text:p>
          </table:table-cell>
          <table:table-cell office:value-type="string">
            <text:p>vegetables, rice, eggs, spices, cheese, beans</text:p>
          </table:table-cell>
          <table:table-cell office:value-type="string">
            <text:p>Vegetables x1, Rice x1, Eggs x1, Spices x1, Cheese x1, Beans x1</text:p>
          </table:table-cell>
        </table:table-row>
        <table:table-row>
          <table:table-cell office:value-type="string">
            <text:p>players_8_vegetables_followup_1</text:p>
          </table:table-cell>
          <table:table-cell office:value-type="string">
            <text:p>players_8</text:p>
          </table:table-cell>
          <table:table-cell office:value-type="float" office:value="8">
            <text:p>8</text:p>
          </table:table-cell>
          <table:table-cell office:value-type="string">
            <text:p>followup_1</text:p>
          </table:table-cell>
          <table:table-cell office:value-type="string">
            <text:p>vegetables</text:p>
          </table:table-cell>
          <table:table-cell office:value-type="string">
            <text:p>Vegetables</text:p>
          </table:table-cell>
          <table:table-cell office:value-type="string">
            <text:p>Vegetable Chili</text:p>
          </table:table-cell>
          <table:table-cell office:value-type="string">
            <text:p>chili</text:p>
          </table:table-cell>
          <table:table-cell office:value-type="string">
            <text:p>cup</text:p>
          </table:table-cell>
          <table:table-cell office:value-type="string">
            <text:p>cups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one_double_four_singles</text:p>
          </table:table-cell>
          <table:table-cell office:value-type="string">
            <text:p>beans, vegetables, spices, cheese, herbs</text:p>
          </table:table-cell>
          <table:table-cell office:value-type="string">
            <text:p>Beans x2, Vegetables x1, Spices x1, Cheese x1, Herbs x1</text:p>
          </table:table-cell>
        </table:table-row>
        <table:table-row>
          <table:table-cell office:value-type="string">
            <text:p>players_8_vegetables_followup_2</text:p>
          </table:table-cell>
          <table:table-cell office:value-type="string">
            <text:p>players_8</text:p>
          </table:table-cell>
          <table:table-cell office:value-type="float" office:value="8">
            <text:p>8</text:p>
          </table:table-cell>
          <table:table-cell office:value-type="string">
            <text:p>followup_2</text:p>
          </table:table-cell>
          <table:table-cell office:value-type="string">
            <text:p>vegetables</text:p>
          </table:table-cell>
          <table:table-cell office:value-type="string">
            <text:p>Vegetables</text:p>
          </table:table-cell>
          <table:table-cell office:value-type="string">
            <text:p>Veggie Omelet</text:p>
          </table:table-cell>
          <table:table-cell office:value-type="string">
            <text:p>omelet</text:p>
          </table:table-cell>
          <table:table-cell office:value-type="string">
            <text:p>slice</text:p>
          </table:table-cell>
          <table:table-cell office:value-type="string">
            <text:p>slices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two_doubles_two_singles</text:p>
          </table:table-cell>
          <table:table-cell office:value-type="string">
            <text:p>cheese, herbs, vegetables, eggs</text:p>
          </table:table-cell>
          <table:table-cell office:value-type="string">
            <text:p>Cheese x2, Herbs x2, Vegetables x1, Eggs x1</text:p>
          </table:table-cell>
        </table:table-row>
        <table:table-row>
          <table:table-cell office:value-type="string">
            <text:p>players_8_rice_initial</text:p>
          </table:table-cell>
          <table:table-cell office:value-type="string">
            <text:p>players_8</text:p>
          </table:table-cell>
          <table:table-cell office:value-type="float" office:value="8">
            <text:p>8</text:p>
          </table:table-cell>
          <table:table-cell office:value-type="string">
            <text:p>initial</text:p>
          </table:table-cell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string">
            <text:p>Fried Rice</text:p>
          </table:table-cell>
          <table:table-cell office:value-type="string">
            <text:p>rice dish</text:p>
          </table:table-cell>
          <table:table-cell office:value-type="string">
            <text:p>scoop</text:p>
          </table:table-cell>
          <table:table-cell office:value-type="string">
            <text:p>scoops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string">
            <text:p>six_singles</text:p>
          </table:table-cell>
          <table:table-cell office:value-type="string">
            <text:p>rice, eggs, vegetables, herbs, spices, beans</text:p>
          </table:table-cell>
          <table:table-cell office:value-type="string">
            <text:p>Rice x1, Eggs x1, Vegetables x1, Herbs x1, Spices x1, Beans x1</text:p>
          </table:table-cell>
        </table:table-row>
        <table:table-row>
          <table:table-cell office:value-type="string">
            <text:p>players_8_rice_followup_1</text:p>
          </table:table-cell>
          <table:table-cell office:value-type="string">
            <text:p>players_8</text:p>
          </table:table-cell>
          <table:table-cell office:value-type="float" office:value="8">
            <text:p>8</text:p>
          </table:table-cell>
          <table:table-cell office:value-type="string">
            <text:p>followup_1</text:p>
          </table:table-cell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string">
            <text:p>Rice Bean Bowl</text:p>
          </table:table-cell>
          <table:table-cell office:value-type="string">
            <text:p>rice bowl</text:p>
          </table:table-cell>
          <table:table-cell office:value-type="string">
            <text:p>scoop</text:p>
          </table:table-cell>
          <table:table-cell office:value-type="string">
            <text:p>scoops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one_double_four_singles</text:p>
          </table:table-cell>
          <table:table-cell office:value-type="string">
            <text:p>rice, beans, vegetables, spices, cheese</text:p>
          </table:table-cell>
          <table:table-cell office:value-type="string">
            <text:p>Rice x2, Beans x1, Vegetables x1, Spices x1, Cheese x1</text:p>
          </table:table-cell>
        </table:table-row>
        <table:table-row>
          <table:table-cell office:value-type="string">
            <text:p>players_8_rice_followup_2</text:p>
          </table:table-cell>
          <table:table-cell office:value-type="string">
            <text:p>players_8</text:p>
          </table:table-cell>
          <table:table-cell office:value-type="float" office:value="8">
            <text:p>8</text:p>
          </table:table-cell>
          <table:table-cell office:value-type="string">
            <text:p>followup_2</text:p>
          </table:table-cell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string">
            <text:p>Rice Cakes</text:p>
          </table:table-cell>
          <table:table-cell office:value-type="string">
            <text:p>rice cake</text:p>
          </table:table-cell>
          <table:table-cell office:value-type="string">
            <text:p>piece</text:p>
          </table:table-cell>
          <table:table-cell office:value-type="string">
            <text:p>pieces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two_doubles_two_singles</text:p>
          </table:table-cell>
          <table:table-cell office:value-type="string">
            <text:p>rice, cheese, eggs, herbs</text:p>
          </table:table-cell>
          <table:table-cell office:value-type="string">
            <text:p>Rice x2, Cheese x2, Eggs x1, Herbs x1</text:p>
          </table:table-cell>
        </table:table-row>
        <table:table-row>
          <table:table-cell office:value-type="string">
            <text:p>players_8_beans_initial</text:p>
          </table:table-cell>
          <table:table-cell office:value-type="string">
            <text:p>players_8</text:p>
          </table:table-cell>
          <table:table-cell office:value-type="float" office:value="8">
            <text:p>8</text:p>
          </table:table-cell>
          <table:table-cell office:value-type="string">
            <text:p>initial</text:p>
          </table:table-cell>
          <table:table-cell office:value-type="string">
            <text:p>beans</text:p>
          </table:table-cell>
          <table:table-cell office:value-type="string">
            <text:p>Beans</text:p>
          </table:table-cell>
          <table:table-cell office:value-type="string">
            <text:p>Bean Shakshuka</text:p>
          </table:table-cell>
          <table:table-cell office:value-type="string">
            <text:p>bean stew</text:p>
          </table:table-cell>
          <table:table-cell office:value-type="string">
            <text:p>cup</text:p>
          </table:table-cell>
          <table:table-cell office:value-type="string">
            <text:p>cups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string">
            <text:p>six_singles</text:p>
          </table:table-cell>
          <table:table-cell office:value-type="string">
            <text:p>beans, vegetables, spices, eggs, herbs, cheese</text:p>
          </table:table-cell>
          <table:table-cell office:value-type="string">
            <text:p>Beans x1, Vegetables x1, Spices x1, Eggs x1, Herbs x1, Cheese x1</text:p>
          </table:table-cell>
        </table:table-row>
        <table:table-row>
          <table:table-cell office:value-type="string">
            <text:p>players_8_beans_followup_1</text:p>
          </table:table-cell>
          <table:table-cell office:value-type="string">
            <text:p>players_8</text:p>
          </table:table-cell>
          <table:table-cell office:value-type="float" office:value="8">
            <text:p>8</text:p>
          </table:table-cell>
          <table:table-cell office:value-type="string">
            <text:p>followup_1</text:p>
          </table:table-cell>
          <table:table-cell office:value-type="string">
            <text:p>beans</text:p>
          </table:table-cell>
          <table:table-cell office:value-type="string">
            <text:p>Beans</text:p>
          </table:table-cell>
          <table:table-cell office:value-type="string">
            <text:p>Bean Burrito</text:p>
          </table:table-cell>
          <table:table-cell office:value-type="string">
            <text:p>wrap</text:p>
          </table:table-cell>
          <table:table-cell office:value-type="string">
            <text:p>piece</text:p>
          </table:table-cell>
          <table:table-cell office:value-type="string">
            <text:p>pieces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one_double_four_singles</text:p>
          </table:table-cell>
          <table:table-cell office:value-type="string">
            <text:p>beans, flour, cheese, vegetables, spices</text:p>
          </table:table-cell>
          <table:table-cell office:value-type="string">
            <text:p>Beans x2, Flour x1, Cheese x1, Vegetables x1, Spices x1</text:p>
          </table:table-cell>
        </table:table-row>
        <table:table-row>
          <table:table-cell office:value-type="string">
            <text:p>players_8_beans_followup_2</text:p>
          </table:table-cell>
          <table:table-cell office:value-type="string">
            <text:p>players_8</text:p>
          </table:table-cell>
          <table:table-cell office:value-type="float" office:value="8">
            <text:p>8</text:p>
          </table:table-cell>
          <table:table-cell office:value-type="string">
            <text:p>followup_2</text:p>
          </table:table-cell>
          <table:table-cell office:value-type="string">
            <text:p>beans</text:p>
          </table:table-cell>
          <table:table-cell office:value-type="string">
            <text:p>Beans</text:p>
          </table:table-cell>
          <table:table-cell office:value-type="string">
            <text:p>Bean Dip</text:p>
          </table:table-cell>
          <table:table-cell office:value-type="string">
            <text:p>dip</text:p>
          </table:table-cell>
          <table:table-cell office:value-type="string">
            <text:p>scoop</text:p>
          </table:table-cell>
          <table:table-cell office:value-type="string">
            <text:p>scoops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two_doubles_two_singles</text:p>
          </table:table-cell>
          <table:table-cell office:value-type="string">
            <text:p>beans, cheese, spices, herbs</text:p>
          </table:table-cell>
          <table:table-cell office:value-type="string">
            <text:p>Beans x2, Cheese x2, Spices x1, Herbs x1</text:p>
          </table:table-cell>
        </table:table-row>
        <table:table-row>
          <table:table-cell office:value-type="string">
            <text:p>players_8_spices_initial</text:p>
          </table:table-cell>
          <table:table-cell office:value-type="string">
            <text:p>players_8</text:p>
          </table:table-cell>
          <table:table-cell office:value-type="float" office:value="8">
            <text:p>8</text:p>
          </table:table-cell>
          <table:table-cell office:value-type="string">
            <text:p>initial</text:p>
          </table:table-cell>
          <table:table-cell office:value-type="string">
            <text:p>spices</text:p>
          </table:table-cell>
          <table:table-cell office:value-type="string">
            <text:p>Spices</text:p>
          </table:table-cell>
          <table:table-cell office:value-type="string">
            <text:p>Spiced Rice Pilaf</text:p>
          </table:table-cell>
          <table:table-cell office:value-type="string">
            <text:p>rice dish</text:p>
          </table:table-cell>
          <table:table-cell office:value-type="string">
            <text:p>scoop</text:p>
          </table:table-cell>
          <table:table-cell office:value-type="string">
            <text:p>scoops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string">
            <text:p>six_singles</text:p>
          </table:table-cell>
          <table:table-cell office:value-type="string">
            <text:p>spices, rice, vegetables, herbs, beans, cheese</text:p>
          </table:table-cell>
          <table:table-cell office:value-type="string">
            <text:p>Spices x1, Rice x1, Vegetables x1, Herbs x1, Beans x1, Cheese x1</text:p>
          </table:table-cell>
        </table:table-row>
        <table:table-row>
          <table:table-cell office:value-type="string">
            <text:p>players_8_spices_followup_1</text:p>
          </table:table-cell>
          <table:table-cell office:value-type="string">
            <text:p>players_8</text:p>
          </table:table-cell>
          <table:table-cell office:value-type="float" office:value="8">
            <text:p>8</text:p>
          </table:table-cell>
          <table:table-cell office:value-type="string">
            <text:p>followup_1</text:p>
          </table:table-cell>
          <table:table-cell office:value-type="string">
            <text:p>spices</text:p>
          </table:table-cell>
          <table:table-cell office:value-type="string">
            <text:p>Spices</text:p>
          </table:table-cell>
          <table:table-cell office:value-type="string">
            <text:p>Bean Tacos</text:p>
          </table:table-cell>
          <table:table-cell office:value-type="string">
            <text:p>tacos</text:p>
          </table:table-cell>
          <table:table-cell office:value-type="string">
            <text:p>piece</text:p>
          </table:table-cell>
          <table:table-cell office:value-type="string">
            <text:p>pieces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one_double_four_singles</text:p>
          </table:table-cell>
          <table:table-cell office:value-type="string">
            <text:p>spices, beans, flour, vegetables, cheese</text:p>
          </table:table-cell>
          <table:table-cell office:value-type="string">
            <text:p>Spices x2, Beans x1, Flour x1, Vegetables x1, Cheese x1</text:p>
          </table:table-cell>
        </table:table-row>
        <table:table-row>
          <table:table-cell office:value-type="string">
            <text:p>players_8_spices_followup_2</text:p>
          </table:table-cell>
          <table:table-cell office:value-type="string">
            <text:p>players_8</text:p>
          </table:table-cell>
          <table:table-cell office:value-type="float" office:value="8">
            <text:p>8</text:p>
          </table:table-cell>
          <table:table-cell office:value-type="string">
            <text:p>followup_2</text:p>
          </table:table-cell>
          <table:table-cell office:value-type="string">
            <text:p>spices</text:p>
          </table:table-cell>
          <table:table-cell office:value-type="string">
            <text:p>Spices</text:p>
          </table:table-cell>
          <table:table-cell office:value-type="string">
            <text:p>Masala Omelet</text:p>
          </table:table-cell>
          <table:table-cell office:value-type="string">
            <text:p>omelet</text:p>
          </table:table-cell>
          <table:table-cell office:value-type="string">
            <text:p>slice</text:p>
          </table:table-cell>
          <table:table-cell office:value-type="string">
            <text:p>slices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two_doubles_two_singles</text:p>
          </table:table-cell>
          <table:table-cell office:value-type="string">
            <text:p>spices, eggs, vegetables, herbs</text:p>
          </table:table-cell>
          <table:table-cell office:value-type="string">
            <text:p>Spices x2, Eggs x2, Vegetables x1, Herbs x1</text:p>
          </table:table-cell>
        </table:table-row>
        <table:table-row>
          <table:table-cell office:value-type="string">
            <text:p>players_8_eggs_initial</text:p>
          </table:table-cell>
          <table:table-cell office:value-type="string">
            <text:p>players_8</text:p>
          </table:table-cell>
          <table:table-cell office:value-type="float" office:value="8">
            <text:p>8</text:p>
          </table:table-cell>
          <table:table-cell office:value-type="string">
            <text:p>initial</text:p>
          </table:table-cell>
          <table:table-cell office:value-type="string">
            <text:p>eggs</text:p>
          </table:table-cell>
          <table:table-cell office:value-type="string">
            <text:p>Eggs</text:p>
          </table:table-cell>
          <table:table-cell office:value-type="string">
            <text:p>Breakfast Burrito</text:p>
          </table:table-cell>
          <table:table-cell office:value-type="string">
            <text:p>wrap</text:p>
          </table:table-cell>
          <table:table-cell office:value-type="string">
            <text:p>piece</text:p>
          </table:table-cell>
          <table:table-cell office:value-type="string">
            <text:p>pieces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string">
            <text:p>six_singles</text:p>
          </table:table-cell>
          <table:table-cell office:value-type="string">
            <text:p>eggs, flour, cheese, vegetables, beans, spices</text:p>
          </table:table-cell>
          <table:table-cell office:value-type="string">
            <text:p>Eggs x1, Flour x1, Cheese x1, Vegetables x1, Beans x1, Spices x1</text:p>
          </table:table-cell>
        </table:table-row>
        <table:table-row>
          <table:table-cell office:value-type="string">
            <text:p>players_8_eggs_followup_1</text:p>
          </table:table-cell>
          <table:table-cell office:value-type="string">
            <text:p>players_8</text:p>
          </table:table-cell>
          <table:table-cell office:value-type="float" office:value="8">
            <text:p>8</text:p>
          </table:table-cell>
          <table:table-cell office:value-type="string">
            <text:p>followup_1</text:p>
          </table:table-cell>
          <table:table-cell office:value-type="string">
            <text:p>eggs</text:p>
          </table:table-cell>
          <table:table-cell office:value-type="string">
            <text:p>Eggs</text:p>
          </table:table-cell>
          <table:table-cell office:value-type="string">
            <text:p>Egg Fried Rice</text:p>
          </table:table-cell>
          <table:table-cell office:value-type="string">
            <text:p>rice dish</text:p>
          </table:table-cell>
          <table:table-cell office:value-type="string">
            <text:p>scoop</text:p>
          </table:table-cell>
          <table:table-cell office:value-type="string">
            <text:p>scoops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one_double_four_singles</text:p>
          </table:table-cell>
          <table:table-cell office:value-type="string">
            <text:p>eggs, rice, vegetables, herbs, spices</text:p>
          </table:table-cell>
          <table:table-cell office:value-type="string">
            <text:p>Eggs x2, Rice x1, Vegetables x1, Herbs x1, Spices x1</text:p>
          </table:table-cell>
        </table:table-row>
        <table:table-row>
          <table:table-cell office:value-type="string">
            <text:p>players_8_eggs_followup_2</text:p>
          </table:table-cell>
          <table:table-cell office:value-type="string">
            <text:p>players_8</text:p>
          </table:table-cell>
          <table:table-cell office:value-type="float" office:value="8">
            <text:p>8</text:p>
          </table:table-cell>
          <table:table-cell office:value-type="string">
            <text:p>followup_2</text:p>
          </table:table-cell>
          <table:table-cell office:value-type="string">
            <text:p>eggs</text:p>
          </table:table-cell>
          <table:table-cell office:value-type="string">
            <text:p>Eggs</text:p>
          </table:table-cell>
          <table:table-cell office:value-type="string">
            <text:p>Cheese Omelet</text:p>
          </table:table-cell>
          <table:table-cell office:value-type="string">
            <text:p>omelet</text:p>
          </table:table-cell>
          <table:table-cell office:value-type="string">
            <text:p>slice</text:p>
          </table:table-cell>
          <table:table-cell office:value-type="string">
            <text:p>slices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two_doubles_two_singles</text:p>
          </table:table-cell>
          <table:table-cell office:value-type="string">
            <text:p>eggs, cheese, herbs, vegetables</text:p>
          </table:table-cell>
          <table:table-cell office:value-type="string">
            <text:p>Eggs x2, Cheese x2, Herbs x1, Vegetables x1</text:p>
          </table:table-cell>
        </table:table-row>
      </table:table>
      <table:table table:name="Player Count Requirements">
        <table:table-row>
          <table:table-cell office:value-type="string">
            <text:p>recipe_id</text:p>
          </table:table-cell>
          <table:table-cell office:value-type="string">
            <text:p>position</text:p>
          </table:table-cell>
          <table:table-cell office:value-type="string">
            <text:p>ingredient_id</text:p>
          </table:table-cell>
          <table:table-cell office:value-type="string">
            <text:p>ingredient_name</text:p>
          </table:table-cell>
          <table:table-cell office:value-type="string">
            <text:p>required_qty</text:p>
          </table:table-cell>
        </table:table-row>
        <table:table-row>
          <table:table-cell office:value-type="string">
            <text:p>players_8_cheese_initial</text:p>
          </table:table-cell>
          <table:table-cell office:value-type="float" office:value="1">
            <text:p>1</text:p>
          </table:table-cell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cheese_initial</text:p>
          </table:table-cell>
          <table:table-cell office:value-type="float" office:value="2">
            <text:p>2</text:p>
          </table:table-cell>
          <table:table-cell office:value-type="string">
            <text:p>eggs</text:p>
          </table:table-cell>
          <table:table-cell office:value-type="string">
            <text:p>Egg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cheese_initial</text:p>
          </table:table-cell>
          <table:table-cell office:value-type="float" office:value="3">
            <text:p>3</text:p>
          </table:table-cell>
          <table:table-cell office:value-type="string">
            <text:p>vegetables</text:p>
          </table:table-cell>
          <table:table-cell office:value-type="string">
            <text:p>Vegetabl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cheese_initial</text:p>
          </table:table-cell>
          <table:table-cell office:value-type="float" office:value="4">
            <text:p>4</text:p>
          </table:table-cell>
          <table:table-cell office:value-type="string">
            <text:p>herbs</text:p>
          </table:table-cell>
          <table:table-cell office:value-type="string">
            <text:p>Herb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cheese_initial</text:p>
          </table:table-cell>
          <table:table-cell office:value-type="float" office:value="5">
            <text:p>5</text:p>
          </table:table-cell>
          <table:table-cell office:value-type="string">
            <text:p>spices</text:p>
          </table:table-cell>
          <table:table-cell office:value-type="string">
            <text:p>Spic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cheese_initial</text:p>
          </table:table-cell>
          <table:table-cell office:value-type="float" office:value="6">
            <text:p>6</text:p>
          </table:table-cell>
          <table:table-cell office:value-type="string">
            <text:p>flour</text:p>
          </table:table-cell>
          <table:table-cell office:value-type="string">
            <text:p>Flour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cheese_followup_1</text:p>
          </table:table-cell>
          <table:table-cell office:value-type="float" office:value="1">
            <text:p>1</text:p>
          </table:table-cell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layers_8_cheese_followup_1</text:p>
          </table:table-cell>
          <table:table-cell office:value-type="float" office:value="2">
            <text:p>2</text:p>
          </table:table-cell>
          <table:table-cell office:value-type="string">
            <text:p>flour</text:p>
          </table:table-cell>
          <table:table-cell office:value-type="string">
            <text:p>Flour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cheese_followup_1</text:p>
          </table:table-cell>
          <table:table-cell office:value-type="float" office:value="3">
            <text:p>3</text:p>
          </table:table-cell>
          <table:table-cell office:value-type="string">
            <text:p>vegetables</text:p>
          </table:table-cell>
          <table:table-cell office:value-type="string">
            <text:p>Vegetabl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cheese_followup_1</text:p>
          </table:table-cell>
          <table:table-cell office:value-type="float" office:value="4">
            <text:p>4</text:p>
          </table:table-cell>
          <table:table-cell office:value-type="string">
            <text:p>beans</text:p>
          </table:table-cell>
          <table:table-cell office:value-type="string">
            <text:p>Bean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cheese_followup_1</text:p>
          </table:table-cell>
          <table:table-cell office:value-type="float" office:value="5">
            <text:p>5</text:p>
          </table:table-cell>
          <table:table-cell office:value-type="string">
            <text:p>spices</text:p>
          </table:table-cell>
          <table:table-cell office:value-type="string">
            <text:p>Spic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cheese_followup_2</text:p>
          </table:table-cell>
          <table:table-cell office:value-type="float" office:value="1">
            <text:p>1</text:p>
          </table:table-cell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layers_8_cheese_followup_2</text:p>
          </table:table-cell>
          <table:table-cell office:value-type="float" office:value="2">
            <text:p>2</text:p>
          </table:table-cell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layers_8_cheese_followup_2</text:p>
          </table:table-cell>
          <table:table-cell office:value-type="float" office:value="3">
            <text:p>3</text:p>
          </table:table-cell>
          <table:table-cell office:value-type="string">
            <text:p>vegetables</text:p>
          </table:table-cell>
          <table:table-cell office:value-type="string">
            <text:p>Vegetabl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cheese_followup_2</text:p>
          </table:table-cell>
          <table:table-cell office:value-type="float" office:value="4">
            <text:p>4</text:p>
          </table:table-cell>
          <table:table-cell office:value-type="string">
            <text:p>herbs</text:p>
          </table:table-cell>
          <table:table-cell office:value-type="string">
            <text:p>Herb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flour_initial</text:p>
          </table:table-cell>
          <table:table-cell office:value-type="float" office:value="1">
            <text:p>1</text:p>
          </table:table-cell>
          <table:table-cell office:value-type="string">
            <text:p>flour</text:p>
          </table:table-cell>
          <table:table-cell office:value-type="string">
            <text:p>Flour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flour_initial</text:p>
          </table:table-cell>
          <table:table-cell office:value-type="float" office:value="2">
            <text:p>2</text:p>
          </table:table-cell>
          <table:table-cell office:value-type="string">
            <text:p>vegetables</text:p>
          </table:table-cell>
          <table:table-cell office:value-type="string">
            <text:p>Vegetabl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flour_initial</text:p>
          </table:table-cell>
          <table:table-cell office:value-type="float" office:value="3">
            <text:p>3</text:p>
          </table:table-cell>
          <table:table-cell office:value-type="string">
            <text:p>herbs</text:p>
          </table:table-cell>
          <table:table-cell office:value-type="string">
            <text:p>Herb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flour_initial</text:p>
          </table:table-cell>
          <table:table-cell office:value-type="float" office:value="4">
            <text:p>4</text:p>
          </table:table-cell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flour_initial</text:p>
          </table:table-cell>
          <table:table-cell office:value-type="float" office:value="5">
            <text:p>5</text:p>
          </table:table-cell>
          <table:table-cell office:value-type="string">
            <text:p>beans</text:p>
          </table:table-cell>
          <table:table-cell office:value-type="string">
            <text:p>Bean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flour_initial</text:p>
          </table:table-cell>
          <table:table-cell office:value-type="float" office:value="6">
            <text:p>6</text:p>
          </table:table-cell>
          <table:table-cell office:value-type="string">
            <text:p>spices</text:p>
          </table:table-cell>
          <table:table-cell office:value-type="string">
            <text:p>Spic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flour_followup_1</text:p>
          </table:table-cell>
          <table:table-cell office:value-type="float" office:value="1">
            <text:p>1</text:p>
          </table:table-cell>
          <table:table-cell office:value-type="string">
            <text:p>flour</text:p>
          </table:table-cell>
          <table:table-cell office:value-type="string">
            <text:p>Flour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layers_8_flour_followup_1</text:p>
          </table:table-cell>
          <table:table-cell office:value-type="float" office:value="2">
            <text:p>2</text:p>
          </table:table-cell>
          <table:table-cell office:value-type="string">
            <text:p>beans</text:p>
          </table:table-cell>
          <table:table-cell office:value-type="string">
            <text:p>Bean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flour_followup_1</text:p>
          </table:table-cell>
          <table:table-cell office:value-type="float" office:value="3">
            <text:p>3</text:p>
          </table:table-cell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flour_followup_1</text:p>
          </table:table-cell>
          <table:table-cell office:value-type="float" office:value="4">
            <text:p>4</text:p>
          </table:table-cell>
          <table:table-cell office:value-type="string">
            <text:p>vegetables</text:p>
          </table:table-cell>
          <table:table-cell office:value-type="string">
            <text:p>Vegetabl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flour_followup_1</text:p>
          </table:table-cell>
          <table:table-cell office:value-type="float" office:value="5">
            <text:p>5</text:p>
          </table:table-cell>
          <table:table-cell office:value-type="string">
            <text:p>spices</text:p>
          </table:table-cell>
          <table:table-cell office:value-type="string">
            <text:p>Spic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flour_followup_2</text:p>
          </table:table-cell>
          <table:table-cell office:value-type="float" office:value="1">
            <text:p>1</text:p>
          </table:table-cell>
          <table:table-cell office:value-type="string">
            <text:p>flour</text:p>
          </table:table-cell>
          <table:table-cell office:value-type="string">
            <text:p>Flour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layers_8_flour_followup_2</text:p>
          </table:table-cell>
          <table:table-cell office:value-type="float" office:value="2">
            <text:p>2</text:p>
          </table:table-cell>
          <table:table-cell office:value-type="string">
            <text:p>herbs</text:p>
          </table:table-cell>
          <table:table-cell office:value-type="string">
            <text:p>Herbs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layers_8_flour_followup_2</text:p>
          </table:table-cell>
          <table:table-cell office:value-type="float" office:value="3">
            <text:p>3</text:p>
          </table:table-cell>
          <table:table-cell office:value-type="string">
            <text:p>vegetables</text:p>
          </table:table-cell>
          <table:table-cell office:value-type="string">
            <text:p>Vegetabl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flour_followup_2</text:p>
          </table:table-cell>
          <table:table-cell office:value-type="float" office:value="4">
            <text:p>4</text:p>
          </table:table-cell>
          <table:table-cell office:value-type="string">
            <text:p>eggs</text:p>
          </table:table-cell>
          <table:table-cell office:value-type="string">
            <text:p>Egg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herbs_initial</text:p>
          </table:table-cell>
          <table:table-cell office:value-type="float" office:value="1">
            <text:p>1</text:p>
          </table:table-cell>
          <table:table-cell office:value-type="string">
            <text:p>herbs</text:p>
          </table:table-cell>
          <table:table-cell office:value-type="string">
            <text:p>Herb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herbs_initial</text:p>
          </table:table-cell>
          <table:table-cell office:value-type="float" office:value="2">
            <text:p>2</text:p>
          </table:table-cell>
          <table:table-cell office:value-type="string">
            <text:p>eggs</text:p>
          </table:table-cell>
          <table:table-cell office:value-type="string">
            <text:p>Egg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herbs_initial</text:p>
          </table:table-cell>
          <table:table-cell office:value-type="float" office:value="3">
            <text:p>3</text:p>
          </table:table-cell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herbs_initial</text:p>
          </table:table-cell>
          <table:table-cell office:value-type="float" office:value="4">
            <text:p>4</text:p>
          </table:table-cell>
          <table:table-cell office:value-type="string">
            <text:p>vegetables</text:p>
          </table:table-cell>
          <table:table-cell office:value-type="string">
            <text:p>Vegetabl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herbs_initial</text:p>
          </table:table-cell>
          <table:table-cell office:value-type="float" office:value="5">
            <text:p>5</text:p>
          </table:table-cell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herbs_initial</text:p>
          </table:table-cell>
          <table:table-cell office:value-type="float" office:value="6">
            <text:p>6</text:p>
          </table:table-cell>
          <table:table-cell office:value-type="string">
            <text:p>spices</text:p>
          </table:table-cell>
          <table:table-cell office:value-type="string">
            <text:p>Spic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herbs_followup_1</text:p>
          </table:table-cell>
          <table:table-cell office:value-type="float" office:value="1">
            <text:p>1</text:p>
          </table:table-cell>
          <table:table-cell office:value-type="string">
            <text:p>herbs</text:p>
          </table:table-cell>
          <table:table-cell office:value-type="string">
            <text:p>Herbs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layers_8_herbs_followup_1</text:p>
          </table:table-cell>
          <table:table-cell office:value-type="float" office:value="2">
            <text:p>2</text:p>
          </table:table-cell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herbs_followup_1</text:p>
          </table:table-cell>
          <table:table-cell office:value-type="float" office:value="3">
            <text:p>3</text:p>
          </table:table-cell>
          <table:table-cell office:value-type="string">
            <text:p>vegetables</text:p>
          </table:table-cell>
          <table:table-cell office:value-type="string">
            <text:p>Vegetabl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herbs_followup_1</text:p>
          </table:table-cell>
          <table:table-cell office:value-type="float" office:value="4">
            <text:p>4</text:p>
          </table:table-cell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herbs_followup_1</text:p>
          </table:table-cell>
          <table:table-cell office:value-type="float" office:value="5">
            <text:p>5</text:p>
          </table:table-cell>
          <table:table-cell office:value-type="string">
            <text:p>spices</text:p>
          </table:table-cell>
          <table:table-cell office:value-type="string">
            <text:p>Spic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herbs_followup_2</text:p>
          </table:table-cell>
          <table:table-cell office:value-type="float" office:value="1">
            <text:p>1</text:p>
          </table:table-cell>
          <table:table-cell office:value-type="string">
            <text:p>herbs</text:p>
          </table:table-cell>
          <table:table-cell office:value-type="string">
            <text:p>Herbs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layers_8_herbs_followup_2</text:p>
          </table:table-cell>
          <table:table-cell office:value-type="float" office:value="2">
            <text:p>2</text:p>
          </table:table-cell>
          <table:table-cell office:value-type="string">
            <text:p>beans</text:p>
          </table:table-cell>
          <table:table-cell office:value-type="string">
            <text:p>Beans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layers_8_herbs_followup_2</text:p>
          </table:table-cell>
          <table:table-cell office:value-type="float" office:value="3">
            <text:p>3</text:p>
          </table:table-cell>
          <table:table-cell office:value-type="string">
            <text:p>vegetables</text:p>
          </table:table-cell>
          <table:table-cell office:value-type="string">
            <text:p>Vegetabl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herbs_followup_2</text:p>
          </table:table-cell>
          <table:table-cell office:value-type="float" office:value="4">
            <text:p>4</text:p>
          </table:table-cell>
          <table:table-cell office:value-type="string">
            <text:p>spices</text:p>
          </table:table-cell>
          <table:table-cell office:value-type="string">
            <text:p>Spic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vegetables_initial</text:p>
          </table:table-cell>
          <table:table-cell office:value-type="float" office:value="1">
            <text:p>1</text:p>
          </table:table-cell>
          <table:table-cell office:value-type="string">
            <text:p>vegetables</text:p>
          </table:table-cell>
          <table:table-cell office:value-type="string">
            <text:p>Vegetabl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vegetables_initial</text:p>
          </table:table-cell>
          <table:table-cell office:value-type="float" office:value="2">
            <text:p>2</text:p>
          </table:table-cell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vegetables_initial</text:p>
          </table:table-cell>
          <table:table-cell office:value-type="float" office:value="3">
            <text:p>3</text:p>
          </table:table-cell>
          <table:table-cell office:value-type="string">
            <text:p>eggs</text:p>
          </table:table-cell>
          <table:table-cell office:value-type="string">
            <text:p>Egg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vegetables_initial</text:p>
          </table:table-cell>
          <table:table-cell office:value-type="float" office:value="4">
            <text:p>4</text:p>
          </table:table-cell>
          <table:table-cell office:value-type="string">
            <text:p>spices</text:p>
          </table:table-cell>
          <table:table-cell office:value-type="string">
            <text:p>Spic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vegetables_initial</text:p>
          </table:table-cell>
          <table:table-cell office:value-type="float" office:value="5">
            <text:p>5</text:p>
          </table:table-cell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vegetables_initial</text:p>
          </table:table-cell>
          <table:table-cell office:value-type="float" office:value="6">
            <text:p>6</text:p>
          </table:table-cell>
          <table:table-cell office:value-type="string">
            <text:p>beans</text:p>
          </table:table-cell>
          <table:table-cell office:value-type="string">
            <text:p>Bean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vegetables_followup_1</text:p>
          </table:table-cell>
          <table:table-cell office:value-type="float" office:value="1">
            <text:p>1</text:p>
          </table:table-cell>
          <table:table-cell office:value-type="string">
            <text:p>beans</text:p>
          </table:table-cell>
          <table:table-cell office:value-type="string">
            <text:p>Beans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layers_8_vegetables_followup_1</text:p>
          </table:table-cell>
          <table:table-cell office:value-type="float" office:value="2">
            <text:p>2</text:p>
          </table:table-cell>
          <table:table-cell office:value-type="string">
            <text:p>vegetables</text:p>
          </table:table-cell>
          <table:table-cell office:value-type="string">
            <text:p>Vegetabl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vegetables_followup_1</text:p>
          </table:table-cell>
          <table:table-cell office:value-type="float" office:value="3">
            <text:p>3</text:p>
          </table:table-cell>
          <table:table-cell office:value-type="string">
            <text:p>spices</text:p>
          </table:table-cell>
          <table:table-cell office:value-type="string">
            <text:p>Spic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vegetables_followup_1</text:p>
          </table:table-cell>
          <table:table-cell office:value-type="float" office:value="4">
            <text:p>4</text:p>
          </table:table-cell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vegetables_followup_1</text:p>
          </table:table-cell>
          <table:table-cell office:value-type="float" office:value="5">
            <text:p>5</text:p>
          </table:table-cell>
          <table:table-cell office:value-type="string">
            <text:p>herbs</text:p>
          </table:table-cell>
          <table:table-cell office:value-type="string">
            <text:p>Herb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vegetables_followup_2</text:p>
          </table:table-cell>
          <table:table-cell office:value-type="float" office:value="1">
            <text:p>1</text:p>
          </table:table-cell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layers_8_vegetables_followup_2</text:p>
          </table:table-cell>
          <table:table-cell office:value-type="float" office:value="2">
            <text:p>2</text:p>
          </table:table-cell>
          <table:table-cell office:value-type="string">
            <text:p>herbs</text:p>
          </table:table-cell>
          <table:table-cell office:value-type="string">
            <text:p>Herbs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layers_8_vegetables_followup_2</text:p>
          </table:table-cell>
          <table:table-cell office:value-type="float" office:value="3">
            <text:p>3</text:p>
          </table:table-cell>
          <table:table-cell office:value-type="string">
            <text:p>vegetables</text:p>
          </table:table-cell>
          <table:table-cell office:value-type="string">
            <text:p>Vegetabl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vegetables_followup_2</text:p>
          </table:table-cell>
          <table:table-cell office:value-type="float" office:value="4">
            <text:p>4</text:p>
          </table:table-cell>
          <table:table-cell office:value-type="string">
            <text:p>eggs</text:p>
          </table:table-cell>
          <table:table-cell office:value-type="string">
            <text:p>Egg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rice_initial</text:p>
          </table:table-cell>
          <table:table-cell office:value-type="float" office:value="1">
            <text:p>1</text:p>
          </table:table-cell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rice_initial</text:p>
          </table:table-cell>
          <table:table-cell office:value-type="float" office:value="2">
            <text:p>2</text:p>
          </table:table-cell>
          <table:table-cell office:value-type="string">
            <text:p>eggs</text:p>
          </table:table-cell>
          <table:table-cell office:value-type="string">
            <text:p>Egg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rice_initial</text:p>
          </table:table-cell>
          <table:table-cell office:value-type="float" office:value="3">
            <text:p>3</text:p>
          </table:table-cell>
          <table:table-cell office:value-type="string">
            <text:p>vegetables</text:p>
          </table:table-cell>
          <table:table-cell office:value-type="string">
            <text:p>Vegetabl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rice_initial</text:p>
          </table:table-cell>
          <table:table-cell office:value-type="float" office:value="4">
            <text:p>4</text:p>
          </table:table-cell>
          <table:table-cell office:value-type="string">
            <text:p>herbs</text:p>
          </table:table-cell>
          <table:table-cell office:value-type="string">
            <text:p>Herb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rice_initial</text:p>
          </table:table-cell>
          <table:table-cell office:value-type="float" office:value="5">
            <text:p>5</text:p>
          </table:table-cell>
          <table:table-cell office:value-type="string">
            <text:p>spices</text:p>
          </table:table-cell>
          <table:table-cell office:value-type="string">
            <text:p>Spic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rice_initial</text:p>
          </table:table-cell>
          <table:table-cell office:value-type="float" office:value="6">
            <text:p>6</text:p>
          </table:table-cell>
          <table:table-cell office:value-type="string">
            <text:p>beans</text:p>
          </table:table-cell>
          <table:table-cell office:value-type="string">
            <text:p>Bean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rice_followup_1</text:p>
          </table:table-cell>
          <table:table-cell office:value-type="float" office:value="1">
            <text:p>1</text:p>
          </table:table-cell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layers_8_rice_followup_1</text:p>
          </table:table-cell>
          <table:table-cell office:value-type="float" office:value="2">
            <text:p>2</text:p>
          </table:table-cell>
          <table:table-cell office:value-type="string">
            <text:p>beans</text:p>
          </table:table-cell>
          <table:table-cell office:value-type="string">
            <text:p>Bean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rice_followup_1</text:p>
          </table:table-cell>
          <table:table-cell office:value-type="float" office:value="3">
            <text:p>3</text:p>
          </table:table-cell>
          <table:table-cell office:value-type="string">
            <text:p>vegetables</text:p>
          </table:table-cell>
          <table:table-cell office:value-type="string">
            <text:p>Vegetabl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rice_followup_1</text:p>
          </table:table-cell>
          <table:table-cell office:value-type="float" office:value="4">
            <text:p>4</text:p>
          </table:table-cell>
          <table:table-cell office:value-type="string">
            <text:p>spices</text:p>
          </table:table-cell>
          <table:table-cell office:value-type="string">
            <text:p>Spic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rice_followup_1</text:p>
          </table:table-cell>
          <table:table-cell office:value-type="float" office:value="5">
            <text:p>5</text:p>
          </table:table-cell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rice_followup_2</text:p>
          </table:table-cell>
          <table:table-cell office:value-type="float" office:value="1">
            <text:p>1</text:p>
          </table:table-cell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layers_8_rice_followup_2</text:p>
          </table:table-cell>
          <table:table-cell office:value-type="float" office:value="2">
            <text:p>2</text:p>
          </table:table-cell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layers_8_rice_followup_2</text:p>
          </table:table-cell>
          <table:table-cell office:value-type="float" office:value="3">
            <text:p>3</text:p>
          </table:table-cell>
          <table:table-cell office:value-type="string">
            <text:p>eggs</text:p>
          </table:table-cell>
          <table:table-cell office:value-type="string">
            <text:p>Egg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rice_followup_2</text:p>
          </table:table-cell>
          <table:table-cell office:value-type="float" office:value="4">
            <text:p>4</text:p>
          </table:table-cell>
          <table:table-cell office:value-type="string">
            <text:p>herbs</text:p>
          </table:table-cell>
          <table:table-cell office:value-type="string">
            <text:p>Herb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beans_initial</text:p>
          </table:table-cell>
          <table:table-cell office:value-type="float" office:value="1">
            <text:p>1</text:p>
          </table:table-cell>
          <table:table-cell office:value-type="string">
            <text:p>beans</text:p>
          </table:table-cell>
          <table:table-cell office:value-type="string">
            <text:p>Bean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beans_initial</text:p>
          </table:table-cell>
          <table:table-cell office:value-type="float" office:value="2">
            <text:p>2</text:p>
          </table:table-cell>
          <table:table-cell office:value-type="string">
            <text:p>vegetables</text:p>
          </table:table-cell>
          <table:table-cell office:value-type="string">
            <text:p>Vegetabl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beans_initial</text:p>
          </table:table-cell>
          <table:table-cell office:value-type="float" office:value="3">
            <text:p>3</text:p>
          </table:table-cell>
          <table:table-cell office:value-type="string">
            <text:p>spices</text:p>
          </table:table-cell>
          <table:table-cell office:value-type="string">
            <text:p>Spic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beans_initial</text:p>
          </table:table-cell>
          <table:table-cell office:value-type="float" office:value="4">
            <text:p>4</text:p>
          </table:table-cell>
          <table:table-cell office:value-type="string">
            <text:p>eggs</text:p>
          </table:table-cell>
          <table:table-cell office:value-type="string">
            <text:p>Egg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beans_initial</text:p>
          </table:table-cell>
          <table:table-cell office:value-type="float" office:value="5">
            <text:p>5</text:p>
          </table:table-cell>
          <table:table-cell office:value-type="string">
            <text:p>herbs</text:p>
          </table:table-cell>
          <table:table-cell office:value-type="string">
            <text:p>Herb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beans_initial</text:p>
          </table:table-cell>
          <table:table-cell office:value-type="float" office:value="6">
            <text:p>6</text:p>
          </table:table-cell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beans_followup_1</text:p>
          </table:table-cell>
          <table:table-cell office:value-type="float" office:value="1">
            <text:p>1</text:p>
          </table:table-cell>
          <table:table-cell office:value-type="string">
            <text:p>beans</text:p>
          </table:table-cell>
          <table:table-cell office:value-type="string">
            <text:p>Beans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layers_8_beans_followup_1</text:p>
          </table:table-cell>
          <table:table-cell office:value-type="float" office:value="2">
            <text:p>2</text:p>
          </table:table-cell>
          <table:table-cell office:value-type="string">
            <text:p>flour</text:p>
          </table:table-cell>
          <table:table-cell office:value-type="string">
            <text:p>Flour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beans_followup_1</text:p>
          </table:table-cell>
          <table:table-cell office:value-type="float" office:value="3">
            <text:p>3</text:p>
          </table:table-cell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beans_followup_1</text:p>
          </table:table-cell>
          <table:table-cell office:value-type="float" office:value="4">
            <text:p>4</text:p>
          </table:table-cell>
          <table:table-cell office:value-type="string">
            <text:p>vegetables</text:p>
          </table:table-cell>
          <table:table-cell office:value-type="string">
            <text:p>Vegetabl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beans_followup_1</text:p>
          </table:table-cell>
          <table:table-cell office:value-type="float" office:value="5">
            <text:p>5</text:p>
          </table:table-cell>
          <table:table-cell office:value-type="string">
            <text:p>spices</text:p>
          </table:table-cell>
          <table:table-cell office:value-type="string">
            <text:p>Spic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beans_followup_2</text:p>
          </table:table-cell>
          <table:table-cell office:value-type="float" office:value="1">
            <text:p>1</text:p>
          </table:table-cell>
          <table:table-cell office:value-type="string">
            <text:p>beans</text:p>
          </table:table-cell>
          <table:table-cell office:value-type="string">
            <text:p>Beans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layers_8_beans_followup_2</text:p>
          </table:table-cell>
          <table:table-cell office:value-type="float" office:value="2">
            <text:p>2</text:p>
          </table:table-cell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layers_8_beans_followup_2</text:p>
          </table:table-cell>
          <table:table-cell office:value-type="float" office:value="3">
            <text:p>3</text:p>
          </table:table-cell>
          <table:table-cell office:value-type="string">
            <text:p>spices</text:p>
          </table:table-cell>
          <table:table-cell office:value-type="string">
            <text:p>Spic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beans_followup_2</text:p>
          </table:table-cell>
          <table:table-cell office:value-type="float" office:value="4">
            <text:p>4</text:p>
          </table:table-cell>
          <table:table-cell office:value-type="string">
            <text:p>herbs</text:p>
          </table:table-cell>
          <table:table-cell office:value-type="string">
            <text:p>Herb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spices_initial</text:p>
          </table:table-cell>
          <table:table-cell office:value-type="float" office:value="1">
            <text:p>1</text:p>
          </table:table-cell>
          <table:table-cell office:value-type="string">
            <text:p>spices</text:p>
          </table:table-cell>
          <table:table-cell office:value-type="string">
            <text:p>Spic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spices_initial</text:p>
          </table:table-cell>
          <table:table-cell office:value-type="float" office:value="2">
            <text:p>2</text:p>
          </table:table-cell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spices_initial</text:p>
          </table:table-cell>
          <table:table-cell office:value-type="float" office:value="3">
            <text:p>3</text:p>
          </table:table-cell>
          <table:table-cell office:value-type="string">
            <text:p>vegetables</text:p>
          </table:table-cell>
          <table:table-cell office:value-type="string">
            <text:p>Vegetabl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spices_initial</text:p>
          </table:table-cell>
          <table:table-cell office:value-type="float" office:value="4">
            <text:p>4</text:p>
          </table:table-cell>
          <table:table-cell office:value-type="string">
            <text:p>herbs</text:p>
          </table:table-cell>
          <table:table-cell office:value-type="string">
            <text:p>Herb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spices_initial</text:p>
          </table:table-cell>
          <table:table-cell office:value-type="float" office:value="5">
            <text:p>5</text:p>
          </table:table-cell>
          <table:table-cell office:value-type="string">
            <text:p>beans</text:p>
          </table:table-cell>
          <table:table-cell office:value-type="string">
            <text:p>Bean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spices_initial</text:p>
          </table:table-cell>
          <table:table-cell office:value-type="float" office:value="6">
            <text:p>6</text:p>
          </table:table-cell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spices_followup_1</text:p>
          </table:table-cell>
          <table:table-cell office:value-type="float" office:value="1">
            <text:p>1</text:p>
          </table:table-cell>
          <table:table-cell office:value-type="string">
            <text:p>spices</text:p>
          </table:table-cell>
          <table:table-cell office:value-type="string">
            <text:p>Spices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layers_8_spices_followup_1</text:p>
          </table:table-cell>
          <table:table-cell office:value-type="float" office:value="2">
            <text:p>2</text:p>
          </table:table-cell>
          <table:table-cell office:value-type="string">
            <text:p>beans</text:p>
          </table:table-cell>
          <table:table-cell office:value-type="string">
            <text:p>Bean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spices_followup_1</text:p>
          </table:table-cell>
          <table:table-cell office:value-type="float" office:value="3">
            <text:p>3</text:p>
          </table:table-cell>
          <table:table-cell office:value-type="string">
            <text:p>flour</text:p>
          </table:table-cell>
          <table:table-cell office:value-type="string">
            <text:p>Flour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spices_followup_1</text:p>
          </table:table-cell>
          <table:table-cell office:value-type="float" office:value="4">
            <text:p>4</text:p>
          </table:table-cell>
          <table:table-cell office:value-type="string">
            <text:p>vegetables</text:p>
          </table:table-cell>
          <table:table-cell office:value-type="string">
            <text:p>Vegetabl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spices_followup_1</text:p>
          </table:table-cell>
          <table:table-cell office:value-type="float" office:value="5">
            <text:p>5</text:p>
          </table:table-cell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spices_followup_2</text:p>
          </table:table-cell>
          <table:table-cell office:value-type="float" office:value="1">
            <text:p>1</text:p>
          </table:table-cell>
          <table:table-cell office:value-type="string">
            <text:p>spices</text:p>
          </table:table-cell>
          <table:table-cell office:value-type="string">
            <text:p>Spices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layers_8_spices_followup_2</text:p>
          </table:table-cell>
          <table:table-cell office:value-type="float" office:value="2">
            <text:p>2</text:p>
          </table:table-cell>
          <table:table-cell office:value-type="string">
            <text:p>eggs</text:p>
          </table:table-cell>
          <table:table-cell office:value-type="string">
            <text:p>Eggs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layers_8_spices_followup_2</text:p>
          </table:table-cell>
          <table:table-cell office:value-type="float" office:value="3">
            <text:p>3</text:p>
          </table:table-cell>
          <table:table-cell office:value-type="string">
            <text:p>vegetables</text:p>
          </table:table-cell>
          <table:table-cell office:value-type="string">
            <text:p>Vegetabl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spices_followup_2</text:p>
          </table:table-cell>
          <table:table-cell office:value-type="float" office:value="4">
            <text:p>4</text:p>
          </table:table-cell>
          <table:table-cell office:value-type="string">
            <text:p>herbs</text:p>
          </table:table-cell>
          <table:table-cell office:value-type="string">
            <text:p>Herb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eggs_initial</text:p>
          </table:table-cell>
          <table:table-cell office:value-type="float" office:value="1">
            <text:p>1</text:p>
          </table:table-cell>
          <table:table-cell office:value-type="string">
            <text:p>eggs</text:p>
          </table:table-cell>
          <table:table-cell office:value-type="string">
            <text:p>Egg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eggs_initial</text:p>
          </table:table-cell>
          <table:table-cell office:value-type="float" office:value="2">
            <text:p>2</text:p>
          </table:table-cell>
          <table:table-cell office:value-type="string">
            <text:p>flour</text:p>
          </table:table-cell>
          <table:table-cell office:value-type="string">
            <text:p>Flour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eggs_initial</text:p>
          </table:table-cell>
          <table:table-cell office:value-type="float" office:value="3">
            <text:p>3</text:p>
          </table:table-cell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eggs_initial</text:p>
          </table:table-cell>
          <table:table-cell office:value-type="float" office:value="4">
            <text:p>4</text:p>
          </table:table-cell>
          <table:table-cell office:value-type="string">
            <text:p>vegetables</text:p>
          </table:table-cell>
          <table:table-cell office:value-type="string">
            <text:p>Vegetabl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eggs_initial</text:p>
          </table:table-cell>
          <table:table-cell office:value-type="float" office:value="5">
            <text:p>5</text:p>
          </table:table-cell>
          <table:table-cell office:value-type="string">
            <text:p>beans</text:p>
          </table:table-cell>
          <table:table-cell office:value-type="string">
            <text:p>Bean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eggs_initial</text:p>
          </table:table-cell>
          <table:table-cell office:value-type="float" office:value="6">
            <text:p>6</text:p>
          </table:table-cell>
          <table:table-cell office:value-type="string">
            <text:p>spices</text:p>
          </table:table-cell>
          <table:table-cell office:value-type="string">
            <text:p>Spic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eggs_followup_1</text:p>
          </table:table-cell>
          <table:table-cell office:value-type="float" office:value="1">
            <text:p>1</text:p>
          </table:table-cell>
          <table:table-cell office:value-type="string">
            <text:p>eggs</text:p>
          </table:table-cell>
          <table:table-cell office:value-type="string">
            <text:p>Eggs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layers_8_eggs_followup_1</text:p>
          </table:table-cell>
          <table:table-cell office:value-type="float" office:value="2">
            <text:p>2</text:p>
          </table:table-cell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eggs_followup_1</text:p>
          </table:table-cell>
          <table:table-cell office:value-type="float" office:value="3">
            <text:p>3</text:p>
          </table:table-cell>
          <table:table-cell office:value-type="string">
            <text:p>vegetables</text:p>
          </table:table-cell>
          <table:table-cell office:value-type="string">
            <text:p>Vegetabl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eggs_followup_1</text:p>
          </table:table-cell>
          <table:table-cell office:value-type="float" office:value="4">
            <text:p>4</text:p>
          </table:table-cell>
          <table:table-cell office:value-type="string">
            <text:p>herbs</text:p>
          </table:table-cell>
          <table:table-cell office:value-type="string">
            <text:p>Herb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eggs_followup_1</text:p>
          </table:table-cell>
          <table:table-cell office:value-type="float" office:value="5">
            <text:p>5</text:p>
          </table:table-cell>
          <table:table-cell office:value-type="string">
            <text:p>spices</text:p>
          </table:table-cell>
          <table:table-cell office:value-type="string">
            <text:p>Spic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eggs_followup_2</text:p>
          </table:table-cell>
          <table:table-cell office:value-type="float" office:value="1">
            <text:p>1</text:p>
          </table:table-cell>
          <table:table-cell office:value-type="string">
            <text:p>eggs</text:p>
          </table:table-cell>
          <table:table-cell office:value-type="string">
            <text:p>Eggs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layers_8_eggs_followup_2</text:p>
          </table:table-cell>
          <table:table-cell office:value-type="float" office:value="2">
            <text:p>2</text:p>
          </table:table-cell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layers_8_eggs_followup_2</text:p>
          </table:table-cell>
          <table:table-cell office:value-type="float" office:value="3">
            <text:p>3</text:p>
          </table:table-cell>
          <table:table-cell office:value-type="string">
            <text:p>herbs</text:p>
          </table:table-cell>
          <table:table-cell office:value-type="string">
            <text:p>Herb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eggs_followup_2</text:p>
          </table:table-cell>
          <table:table-cell office:value-type="float" office:value="4">
            <text:p>4</text:p>
          </table:table-cell>
          <table:table-cell office:value-type="string">
            <text:p>vegetables</text:p>
          </table:table-cell>
          <table:table-cell office:value-type="string">
            <text:p>Vegetables</text:p>
          </table:table-cell>
          <table:table-cell office:value-type="float" office:value="1">
            <text:p>1</text:p>
          </table:table-cell>
        </table:table-row>
      </table:table>
      <table:table table:name="Validation">
        <table:table-row>
          <table:table-cell office:value-type="string">
            <text:p>recipe_id</text:p>
          </table:table-cell>
          <table:table-cell office:value-type="string">
            <text:p>quantity_total_ok</text:p>
          </table:table-cell>
          <table:table-cell office:value-type="string">
            <text:p>distinct_allowed_ok</text:p>
          </table:table-cell>
          <table:table-cell office:value-type="string">
            <text:p>quantity_shape_ok</text:p>
          </table:table-cell>
          <table:table-cell office:value-type="string">
            <text:p>owner_included_ok</text:p>
          </table:table-cell>
          <table:table-cell office:value-type="string">
            <text:p>active_ingredients_only_ok</text:p>
          </table:table-cell>
          <table:table-cell office:value-type="string">
            <text:p>unique_requirements_ok</text:p>
          </table:table-cell>
          <table:table-cell office:value-type="string">
            <text:p>unique_name_ok</text:p>
          </table:table-cell>
          <table:table-cell office:value-type="string">
            <text:p>catalog_demand_within_stock_ok</text:p>
          </table:table-cell>
          <table:table-cell office:value-type="string">
            <text:p>fallback_free_ok</text:p>
          </table:table-cell>
          <table:table-cell office:value-type="string">
            <text:p>accurate_name_ok</text:p>
          </table:table-cell>
          <table:table-cell office:value-type="string">
            <text:p>serving_unit_ok</text:p>
          </table:table-cell>
        </table:table-row>
        <table:table-row>
          <table:table-cell office:value-type="string">
            <text:p>players_8_cheese_initial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players_8_cheese_followup_1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players_8_cheese_followup_2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players_8_flour_initial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players_8_flour_followup_1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players_8_flour_followup_2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players_8_herbs_initial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players_8_herbs_followup_1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players_8_herbs_followup_2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players_8_vegetables_initial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players_8_vegetables_followup_1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players_8_vegetables_followup_2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players_8_rice_initial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players_8_rice_followup_1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players_8_rice_followup_2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players_8_beans_initial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players_8_beans_followup_1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players_8_beans_followup_2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players_8_spices_initial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players_8_spices_followup_1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players_8_spices_followup_2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players_8_eggs_initial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players_8_eggs_followup_1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players_8_eggs_followup_2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</table:table-row>
      </table:table>
    </office:spreadsheet>
  </office:body>
</office:document-content>
</file>